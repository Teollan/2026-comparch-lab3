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611in" table:align="left"/>
    </style:style>
    <style:style style:name="Table1.A" style:family="table-column">
      <style:table-column-properties style:column-width="0.7861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0.3507in" style:rel-column-width="3318*"/>
    </style:style>
    <style:style style:name="Table3.B" style:family="table-column">
      <style:table-column-properties style:column-width="1.0604in" style:rel-column-width="10035*"/>
    </style:style>
    <style:style style:name="Table3.C" style:family="table-column">
      <style:table-column-properties style:column-width="1.9979in" style:rel-column-width="18907*"/>
    </style:style>
    <style:style style:name="Table3.D" style:family="table-column">
      <style:table-column-properties style:column-width="3.516in" style:rel-column-width="3327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4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5" style:family="paragraph" style:parent-style-name="Standard">
      <style:text-properties style:font-name="Liberation Serif" fo:font-size="14pt" fo:language="uk" fo:country="UA" officeooo:rsid="00195560" officeooo:paragraph-rsid="00195560" fo:background-color="transparent" style:font-size-asian="14pt" style:font-size-complex="14pt"/>
    </style:style>
    <style:style style:name="P6" style:family="paragraph" style:parent-style-name="Standard">
      <style:text-properties style:font-name="Liberation Serif" fo:language="uk" fo:country="UA"/>
    </style:style>
    <style:style style:name="P7" style:family="paragraph" style:parent-style-name="Text_20_body">
      <style:text-properties style:font-name="Liberation Serif" fo:language="uk" fo:country="UA" officeooo:paragraph-rsid="0008ee54"/>
    </style:style>
    <style:style style:name="P8" style:family="paragraph" style:parent-style-name="Text_20_body">
      <style:text-properties style:font-name="Liberation Serif" fo:font-size="12pt" fo:language="uk" fo:country="UA" officeooo:rsid="001d06b2" officeooo:paragraph-rsid="001d06b2" style:font-size-asian="10.5pt" style:font-size-complex="12pt"/>
    </style:style>
    <style:style style:name="P9" style:family="paragraph" style:parent-style-name="Standard">
      <style:text-properties fo:language="uk" fo:country="UA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uk" fo:country="UA" fo:font-style="normal" fo:text-shadow="none" style:text-underline-style="none" fo:font-weight="bol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officeooo:rsid="001affe3" officeooo:paragraph-rsid="001aff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paragraph-rsid="001af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officeooo:rsid="001ba679" officeooo:paragraph-rsid="001ba6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Heading_20_1">
      <style:text-properties style:font-name="Liberation Serif" fo:language="uk" fo:country="UA"/>
    </style:style>
    <style:style style:name="P18" style:family="paragraph" style:parent-style-name="Heading_20_1">
      <style:text-properties fo:language="uk" fo:country="UA"/>
    </style:style>
    <style:style style:name="P19" style:family="paragraph" style:parent-style-name="Standard">
      <style:paragraph-properties fo:text-align="center" style:justify-single-word="false"/>
      <style:text-properties fo:language="uk" fo:country="UA"/>
    </style:style>
    <style:style style:name="P20" style:family="paragraph" style:parent-style-name="Standard">
      <style:paragraph-properties fo:text-align="center" style:justify-single-word="false"/>
      <style:text-properties fo:language="uk" fo:country="UA" officeooo:paragraph-rsid="000cb00f"/>
    </style:style>
    <style:style style:name="P21" style:family="paragraph" style:parent-style-name="Standard">
      <style:text-properties fo:language="uk" fo:country="UA"/>
    </style:style>
    <style:style style:name="P22" style:family="paragraph" style:parent-style-name="Text_20_body">
      <style:paragraph-properties fo:text-align="justify" style:justify-single-word="false"/>
      <style:text-properties fo:language="uk" fo:country="UA" officeooo:paragraph-rsid="00179ce7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uk" fo:country="UA" officeooo:paragraph-rsid="00179ce7"/>
    </style:style>
    <style:style style:name="P24" style:family="paragraph" style:parent-style-name="Text_20_body">
      <style:text-properties fo:language="uk" fo:country="UA" officeooo:rsid="001d06b2" officeooo:paragraph-rsid="001d06b2" fo:background-color="transparent"/>
    </style:style>
    <style:style style:name="P25" style:family="paragraph" style:parent-style-name="Title">
      <style:text-properties fo:language="uk" fo:country="U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language="uk" fo:country="UA" fo:font-weight="bold" officeooo:rsid="00195560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style:font-name="Liberation Serif" fo:font-size="14pt" fo:language="uk" fo:country="UA" style:font-size-asian="14pt" style:font-size-complex="14pt"/>
    </style:style>
    <style:style style:name="T6" style:family="text">
      <style:text-properties style:font-name="Liberation Serif" fo:font-size="14pt" fo:language="uk" fo:country="UA" officeooo:rsid="0010d7d8" style:font-size-asian="14pt" style:font-size-complex="14pt"/>
    </style:style>
    <style:style style:name="T7" style:family="text">
      <style:text-properties style:font-name="Liberation Serif" fo:font-size="14pt" fo:language="uk" fo:country="UA" officeooo:rsid="0008ee54" style:font-size-asian="14pt" style:font-size-complex="14pt"/>
    </style:style>
    <style:style style:name="T8" style:family="text">
      <style:text-properties style:font-name="Liberation Serif" fo:font-size="14pt" fo:language="uk" fo:country="UA" fo:background-color="transparent" loext:char-shading-value="0" style:font-size-asian="14pt" style:font-size-complex="14pt"/>
    </style:style>
    <style:style style:name="T9" style:family="text">
      <style:text-properties style:font-name="Liberation Serif" fo:font-size="14pt" fo:language="uk" fo:country="UA" officeooo:rsid="00195560" fo:background-color="transparent" loext:char-shading-value="0" style:font-size-asian="14pt" style:font-size-complex="14pt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style:font-name="Liberation Serif" fo:font-size="14pt" officeooo:rsid="0008ee54" style:font-size-asian="14pt" style:font-size-complex="14pt"/>
    </style:style>
    <style:style style:name="T12" style:family="text">
      <style:text-properties style:font-name="Liberation Serif" fo:font-size="14pt" officeooo:rsid="0010d7d8" style:font-size-asian="14pt" style:font-size-complex="14pt"/>
    </style:style>
    <style:style style:name="T13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4" style:family="text">
      <style:text-properties style:font-name="Liberation Serif" fo:font-size="14pt" officeooo:rsid="00195560" fo:background-color="transparent" loext:char-shading-value="0" style:font-size-asian="14pt" style:font-size-complex="14pt"/>
    </style:style>
    <style:style style:name="T1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fo:font-weight="bold" officeooo:rsid="0009e70d" style:font-size-asian="14pt" style:font-weight-asian="bold" style:font-size-complex="14pt" style:font-weight-complex="bold"/>
    </style:style>
    <style:style style:name="T17" style:family="text">
      <style:text-properties style:font-name="Liberation Serif" fo:font-size="14pt" fo:font-weight="bold" officeooo:rsid="00195560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8" style:family="text">
      <style:text-properties style:font-name="Liberation Serif" fo:language="uk" fo:country="UA"/>
    </style:style>
    <style:style style:name="T19" style:family="text">
      <style:text-properties style:font-name="Liberation Serif" fo:language="uk" fo:country="UA" officeooo:rsid="0008ee54"/>
    </style:style>
    <style:style style:name="T20" style:family="text">
      <style:text-properties style:font-name="Liberation Serif" officeooo:rsid="0008ee54"/>
    </style:style>
    <style:style style:name="T21" style:family="text">
      <style:text-properties officeooo:rsid="00195560" fo:background-color="transparent" loext:char-shading-value="0"/>
    </style:style>
    <style:style style:name="T22" style:family="text">
      <style:text-properties officeooo:rsid="001d06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19"><text:span text:style-name="T15">Факультет </text:span><text:span text:style-name="T16">прикладної математики</text:span></text:p>
      <text:p text:style-name="P20"><text:span text:style-name="T15">Кафедра </text:span><text:span text:style-name="T16">системного програмування</text:span></text:p>
      <text:p text:style-name="P2">і спеціалізованих комп’ютерни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T10">Лабораторна робота №</text:span><text:span text:style-name="T17">3</text:span></text:p>
      <text:p text:style-name="P3">з дисципліни</text:p>
      <text:p text:style-name="P19"><text:span text:style-name="T10">«</text:span><text:span text:style-name="T12">Архітектура для програмістів</text:span><text:span text:style-name="T10">»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0">Викона</text:span><text:span text:style-name="T13">в</text:span><text:span text:style-name="T10">:<text:tab/><text:tab/><text:tab/><text:tab/><text:tab/><text:tab/><text:tab/><text:tab/>Перевіри</text:span><text:span text:style-name="T11">в</text:span><text:span text:style-name="T10">:</text:span></text:p>
      <text:p text:style-name="P9"><text:span text:style-name="T10">студент групи </text:span><text:span text:style-name="T11">КВ</text:span><text:span text:style-name="T10">-</text:span><text:span text:style-name="T14">33</text:span><text:span text:style-name="T10"><text:tab/><text:tab/><text:tab/><text:tab/><text:tab/><text:tab/></text:span><text:span text:style-name="T11">Молчанов О</text:span><text:span text:style-name="T10">. А.</text:span></text:p>
      <text:p text:style-name="P5">Козлов Сергій О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10">Київ – 20</text:span><text:span text:style-name="T14">26</text:span></text:p>
      <text:h text:style-name="P17" text:outline-level="1"><text:soft-page-break/>Загальне завдання</text:h>
      <text:p text:style-name="P22"><text:tab/>Реалізувати програму мовою C або C++, що виконує: зчитування послідовності машинних команд (програми), що визначаються варіантом, з файлу; розбір зчитаних команд і вивід їхнього текстового представлення (асемблерного коду). Крім того необхідно реалізувати модульні тести для реалізованого(-их) модуля(-ів) програми.</text:p>
      <text:p text:style-name="P22"><text:tab/>Програма має містити наступні компоненти (модулі):</text:p>
      <text:list text:style-name="L1">
        <text:list-item>
          <text:p text:style-name="P23">Модуль з реалізацією функцій зчитування і аналізу (розбору) машинних команд з текстового файлу.</text:p>
        </text:list-item>
        <text:list-item>
          <text:p text:style-name="P23">Модуль тестування, що містить тестові утиліти і тести реалізованої програми.</text:p>
        </text:list-item>
      </text:list>
      <text:h text:style-name="P17" text:outline-level="1">Завдання за варіантом <text:span text:style-name="T21">6</text:span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10">Варіант</text:p>
          </table:table-cell>
          <table:table-cell table:style-name="Table1.B1" office:value-type="string">
            <text:p text:style-name="P11">Список команд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B2" office:value-type="string">
            <text:p text:style-name="P14">2, 3, 6, 7, 8, 9, 26, 28, 29</text:p>
          </table:table-cell>
        </table:table-row>
      </table:table>
      <text:p text:style-name="P7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№</text:p>
          </table:table-cell>
          <table:table-cell table:style-name="Table3.A1" office:value-type="string">
            <text:p text:style-name="P11">Команда</text:p>
          </table:table-cell>
          <table:table-cell table:style-name="Table3.A1" office:value-type="string">
            <text:p text:style-name="P11">Код команди (0x)</text:p>
          </table:table-cell>
          <table:table-cell table:style-name="Table3.D1" office:value-type="string">
            <text:p text:style-name="P11">Опис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MOV &lt;reg&gt;,</text:p>
            <text:p text:style-name="P16"><text:s text:c="4"/>&lt;addr&gt;</text:p>
          </table:table-cell>
          <table:table-cell table:style-name="Table3.A2" office:value-type="string">
            <text:p text:style-name="P16">1B 0 /reg /addr</text:p>
            <text:p text:style-name="P16">(пр.: 1B 01 00000042)</text:p>
          </table:table-cell>
          <table:table-cell table:style-name="Table3.D2" office:value-type="string">
            <text:p text:style-name="P16">перемістити значення з ОП за адресою</text:p>
            <text:p text:style-name="P16">&lt;addr&gt; у регістр &lt;reg&gt;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MOV &lt;addr&gt;,</text:p>
            <text:p text:style-name="P16"><text:s text:c="4"/>&lt;reg&gt;</text:p>
          </table:table-cell>
          <table:table-cell table:style-name="Table3.A2" office:value-type="string">
            <text:p text:style-name="P16">1B 1 /reg /addr</text:p>
            <text:p text:style-name="P16">(пр.: 1B 11 00000042)</text:p>
          </table:table-cell>
          <table:table-cell table:style-name="Table3.D2" office:value-type="string">
            <text:p text:style-name="P16">перемістити значення з регістру &lt;reg&gt;</text:p>
            <text:p text:style-name="P16">в ОП за адресою &lt;addr&gt;</text:p>
          </table:table-cell>
        </table:table-row>
        <table:table-row>
          <table:table-cell table:style-name="Table3.A2" office:value-type="string">
            <text:p text:style-name="P15">6</text:p>
          </table:table-cell>
          <table:table-cell table:style-name="Table3.A2" office:value-type="string">
            <text:p text:style-name="P16">ADD &lt;reg1&gt;,</text:p>
            <text:p text:style-name="P16"><text:s text:c="4"/>&lt;reg2&gt;,</text:p>
            <text:p text:style-name="P16"><text:s text:c="4"/>&lt;reg3&gt;</text:p>
          </table:table-cell>
          <table:table-cell table:style-name="Table3.A2" office:value-type="string">
            <text:p text:style-name="P16">03 0 /reg1 /reg2 /reg3</text:p>
            <text:p text:style-name="P16">(пр.: 03 01 23)</text:p>
          </table:table-cell>
          <table:table-cell table:style-name="Table3.D2" office:value-type="string">
            <text:p text:style-name="P16">додавання значення з регістру &lt;reg2&gt;</text:p>
            <text:p text:style-name="P16">до значення з регістру &lt;reg3&gt; і</text:p>
            <text:p text:style-name="P16">збереження результату в регістрі</text:p>
            <text:p text:style-name="P16">&lt;reg1&gt;</text:p>
          </table:table-cell>
        </table:table-row>
        <table:table-row>
          <table:table-cell table:style-name="Table3.A2" office:value-type="string">
            <text:p text:style-name="P15">7</text:p>
          </table:table-cell>
          <table:table-cell table:style-name="Table3.A2" office:value-type="string">
            <text:p text:style-name="P16">ADD &lt;reg1&gt;,</text:p>
            <text:p text:style-name="P16"><text:s text:c="4"/>&lt;reg2&gt;,</text:p>
            <text:p text:style-name="P16"><text:s text:c="4"/>&lt;addr&gt;</text:p>
          </table:table-cell>
          <table:table-cell table:style-name="Table3.A2" office:value-type="string">
            <text:p text:style-name="P16">04 /reg1 /reg2 /addr</text:p>
            <text:p text:style-name="P16">(пр.: 04 12 00000042)</text:p>
          </table:table-cell>
          <table:table-cell table:style-name="Table3.D2" office:value-type="string">
            <text:p text:style-name="P16">додавання значення з регістру &lt;reg2&gt;</text:p>
            <text:p text:style-name="P16">до 4-байтового значення з ОП за</text:p>
            <text:p text:style-name="P16">адресою &lt;addr&gt; і збереження</text:p>
            <text:p text:style-name="P16">результату в регістрі &lt;reg1&gt;</text:p>
          </table:table-cell>
        </table:table-row>
        <table:table-row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6">SUB &lt;reg1&gt;,</text:p>
            <text:p text:style-name="P16"><text:s text:c="4"/>&lt;reg2&gt;</text:p>
          </table:table-cell>
          <table:table-cell table:style-name="Table3.A2" office:value-type="string">
            <text:p text:style-name="P16">0A /reg1 /reg2</text:p>
            <text:p text:style-name="P16">(пр. 0A 12)</text:p>
          </table:table-cell>
          <table:table-cell table:style-name="Table3.D2" office:value-type="string">
            <text:p text:style-name="P16">віднімання від значення в регістрі</text:p>
            <text:p text:style-name="P16">&lt;reg1&gt; значення з регістру &lt;reg2&gt; і</text:p>
            <text:p text:style-name="P16">збереження результату в регістрі</text:p>
            <text:p text:style-name="P16">&lt;reg1&gt;</text:p>
          </table:table-cell>
        </table:table-row>
        <table:table-row>
          <table:table-cell table:style-name="Table3.A2" office:value-type="string">
            <text:p text:style-name="P15">9</text:p>
          </table:table-cell>
          <table:table-cell table:style-name="Table3.A2" office:value-type="string">
            <text:p text:style-name="P16">SUB &lt;reg&gt;,</text:p>
            <text:p text:style-name="P16"><text:s text:c="4"/>&lt;addr&gt;</text:p>
          </table:table-cell>
          <table:table-cell table:style-name="Table3.A2" office:value-type="string">
            <text:p text:style-name="P16">0B 0 /reg /addr</text:p>
            <text:p text:style-name="P16">(пр.: 0B 01 00000042)</text:p>
          </table:table-cell>
          <table:table-cell table:style-name="Table3.D2" office:value-type="string">
            <text:p text:style-name="P16">віднімання від значення в регістрі</text:p>
            <text:p text:style-name="P16">&lt;reg&gt; 4-байтового значення з ОП за</text:p>
            <text:p text:style-name="P16">адресою &lt;addr&gt; і збереження</text:p>
          </table:table-cell>
        </table:table-row>
        <table:table-row>
          <table:table-cell table:style-name="Table3.A2" office:value-type="string">
            <text:p text:style-name="P15">26</text:p>
          </table:table-cell>
          <table:table-cell table:style-name="Table3.A2" office:value-type="string">
            <text:p text:style-name="P16">CMP &lt;reg1&gt;,</text:p>
            <text:p text:style-name="P16"><text:s text:c="4"/>&lt;reg2&gt;</text:p>
          </table:table-cell>
          <table:table-cell table:style-name="Table3.A2" office:value-type="string">
            <text:p text:style-name="P16">80 /reg1 /reg2</text:p>
            <text:p text:style-name="P16">(пр.: 80 12)</text:p>
          </table:table-cell>
          <table:table-cell table:style-name="Table3.D2" office:value-type="string">
            <text:p text:style-name="P16">порівняння двох значень і</text:p>
            <text:p text:style-name="P16">встановлення відповідних прапорців</text:p>
          </table:table-cell>
        </table:table-row>
        <table:table-row table:style-name="Table3.9">
          <table:table-cell table:style-name="Table3.A2" office:value-type="string">
            <text:p text:style-name="P15">28</text:p>
          </table:table-cell>
          <table:table-cell table:style-name="Table3.A2" office:value-type="string">
            <text:p text:style-name="P16">MOV &lt;reg&gt;,</text:p>
            <text:p text:style-name="P16"><text:s text:c="4"/>&lt;lit16&gt;</text:p>
          </table:table-cell>
          <table:table-cell table:style-name="Table3.A2" office:value-type="string">
            <text:p text:style-name="P16">1C 1 /reg /lit16</text:p>
            <text:p text:style-name="P16">(пр.: 1C 11 3344)</text:p>
          </table:table-cell>
          <table:table-cell table:style-name="Table3.D2" office:value-type="string">
            <text:p text:style-name="P16">переміщення 2-байтового числа у</text:p>
            <text:p text:style-name="P16">регістра &lt;reg&gt;</text:p>
          </table:table-cell>
        </table:table-row>
        <table:table-row>
          <table:table-cell table:style-name="Table3.A2" office:value-type="string">
            <text:p text:style-name="P15">29</text:p>
          </table:table-cell>
          <table:table-cell table:style-name="Table3.A2" office:value-type="string">
            <text:p text:style-name="P16">MOV &lt;reg&gt;,</text:p>
            <text:p text:style-name="P16"><text:s text:c="4"/>&lt;lit32&gt;</text:p>
          </table:table-cell>
          <table:table-cell table:style-name="Table3.A2" office:value-type="string">
            <text:p text:style-name="P16">1C 2 /reg /lit32</text:p>
            <text:p text:style-name="P16">(пр.: 1C 21 33445555)</text:p>
          </table:table-cell>
          <table:table-cell table:style-name="Table3.D2" office:value-type="string">
            <text:p text:style-name="P16">переміщення 4-байтового числа у</text:p>
            <text:p text:style-name="P16">регістра &lt;reg&gt;</text:p>
          </table:table-cell>
        </table:table-row>
      </table:table>
      <text:p text:style-name="P7"/>
      <text:h text:style-name="P18" text:outline-level="1"><text:soft-page-break/><text:span text:style-name="T1">1. Лістинг програми</text:span></text:h>
      <text:p text:style-name="P8">Лістинг коду програми наведений в Додатку А.</text:p>
      <text:h text:style-name="P17" text:outline-level="1">2. <text:span text:style-name="T22">Результати тестування</text:span></text:h>
      <text:p text:style-name="P24"><text:span text:style-name="T20">Р</text:span><text:span text:style-name="T1">езультати тестування програми наведені в Додатку 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in" fo:margin-bottom="0in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2:50:33.771036030</meta:creation-date>
    <meta:generator>LibreOffice/24.2.7.2$Linux_X86_64 LibreOffice_project/420$Build-2</meta:generator>
    <dc:date>2026-05-29T20:33:01.370710616</dc:date>
    <meta:editing-duration>PT1H27M14S</meta:editing-duration>
    <meta:editing-cycles>15</meta:editing-cycles>
    <meta:print-date>2026-05-29T20:23:23.589584872</meta:print-date>
    <meta:printed-by>PDF files</meta:printed-by>
    <meta:document-statistic meta:table-count="2" meta:image-count="0" meta:object-count="0" meta:page-count="3" meta:paragraph-count="103" meta:word-count="372" meta:character-count="2421" meta:non-whitespace-character-count="2095"/>
  </office:meta>
</office:document-meta>
</file>