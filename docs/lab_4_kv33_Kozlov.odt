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cb00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language="uk" fo:country="UA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8" style:family="paragraph" style:parent-style-name="Standard">
      <style:text-properties style:font-name="Liberation Serif" fo:font-size="14pt" fo:language="uk" fo:country="UA" fo:background-color="transparent" style:font-size-asian="14pt" style:font-size-complex="14pt"/>
    </style:style>
    <style:style style:name="P9" style:family="paragraph" style:parent-style-name="Standard">
      <style:text-properties fo:language="uk" fo:country="UA" fo:background-color="transparent"/>
    </style:style>
    <style:style style:name="P10" style:family="paragraph" style:parent-style-name="Standard">
      <style:text-properties style:font-name="Liberation Serif" fo:font-size="14pt" fo:language="uk" fo:country="UA" officeooo:rsid="00183067" officeooo:paragraph-rsid="00183067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Heading_20_1">
      <style:text-properties style:font-name="Liberation Serif" fo:language="uk" fo:country="UA"/>
    </style:style>
    <style:style style:name="P13" style:family="paragraph" style:parent-style-name="Text_20_body">
      <style:paragraph-properties fo:text-align="justify" style:justify-single-word="false"/>
      <style:text-properties fo:language="uk" fo:country="UA" officeooo:rsid="011d322d" officeooo:paragraph-rsid="00183067" style:script-type="latin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uk" fo:country="UA" officeooo:rsid="011d322d" officeooo:paragraph-rsid="00183067" style:script-type="latin"/>
    </style:style>
    <style:style style:name="P15" style:family="paragraph" style:parent-style-name="Text_20_body">
      <style:text-properties style:font-name="Liberation Serif" fo:language="uk" fo:country="UA" officeooo:rsid="00183067" officeooo:paragraph-rsid="00183067" fo:background-color="transparent"/>
    </style:style>
    <style:style style:name="T1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language="uk" fo:country="UA" style:font-size-asian="14pt" style:font-size-complex="14pt"/>
    </style:style>
    <style:style style:name="T4" style:family="text">
      <style:text-properties style:font-name="Liberation Serif" fo:font-size="14pt" fo:language="en" fo:country="US" fo:font-weight="bold" officeooo:rsid="00183067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style:font-name="Liberation Serif" fo:font-size="14pt" fo:language="uk" fo:country="UA" officeooo:rsid="0010d7d8" style:font-size-asian="14pt" style:font-size-complex="14pt"/>
    </style:style>
    <style:style style:name="T6" style:family="text">
      <style:text-properties officeooo:rsid="0008ee54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officeooo:rsid="0008ee54" style:font-size-asian="14pt" style:font-size-complex="14pt"/>
    </style:style>
    <style:style style:name="T9" style:family="text">
      <style:text-properties style:font-name="Liberation Serif" fo:font-size="14pt" fo:language="en" fo:country="US" officeooo:rsid="00183067" style:font-size-asian="14pt" style:font-size-complex="14pt"/>
    </style:style>
    <style:style style:name="T10" style:family="text">
      <style:text-properties style:font-name="Liberation Serif" fo:font-size="14pt" fo:language="uk" fo:country="UA" officeooo:rsid="00183067" style:font-size-asian="14pt" style:font-size-complex="14pt"/>
    </style:style>
    <style:style style:name="T11" style:family="text">
      <style:text-properties officeooo:rsid="00183067"/>
    </style:style>
    <style:style style:name="T12" style:family="text">
      <style:text-properties officeooo:rsid="012501c0"/>
    </style:style>
    <style:style style:name="T13" style:family="text">
      <style:text-properties fo:language="en" fo:country="US"/>
    </style:style>
    <style:style style:name="T14" style:family="text">
      <style:text-properties officeooo:rsid="001b9b4c"/>
    </style:style>
    <style:style style:name="T15" style:family="text">
      <style:text-properties fo:language="en" fo:country="US" officeooo:rsid="00196d2e"/>
    </style:style>
    <style:style style:name="T16" style:family="text">
      <style:text-properties officeooo:rsid="00196d2e"/>
    </style:style>
    <style:style style:name="T17" style:family="text">
      <style:text-properties style:font-name="Liberation Serif" fo:font-size="18.2000007629395pt" fo:language="uk" fo:country="UA" fo:font-weight="bold" officeooo:rsid="000cc817" style:font-name-asian="Noto Sans CJK SC" style:font-size-asian="18.2000007629395pt" style:font-weight-asian="bold" style:font-name-complex="Lohit Devanagari1" style:font-size-complex="18.200000762939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2"><text:span text:style-name="T1">Факультет </text:span><text:span text:style-name="T2">прикладної математики</text:span></text:p>
      <text:p text:style-name="P3"><text:span text:style-name="T1">Кафедра </text:span><text:span text:style-name="T2">системного програмування</text:span></text:p>
      <text:p text:style-name="P4">і спеціалізованих комп’ютерних систем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itle"><text:span text:style-name="T3">Лабораторна робота №</text:span><text:span text:style-name="T4">4</text:span></text:p>
      <text:p text:style-name="P6">з дисципліни</text:p>
      <text:p text:style-name="P2"><text:span text:style-name="T3">«</text:span><text:span text:style-name="T5">Архітектура для програмістів</text:span><text:span text:style-name="T3">»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Виконав:<text:tab/><text:tab/><text:tab/><text:tab/><text:tab/><text:tab/><text:tab/><text:tab/>Перевіри<text:span text:style-name="T6">в</text:span>:</text:p>
      <text:p text:style-name="P9"><text:span text:style-name="T7">студент групи </text:span><text:span text:style-name="T8">КВ</text:span><text:span text:style-name="T7">-</text:span><text:span text:style-name="T9">33</text:span><text:span text:style-name="T7"><text:tab/><text:tab/><text:tab/><text:tab/><text:tab/><text:tab/></text:span><text:span text:style-name="T8">Молчанов О</text:span><text:span text:style-name="T7">. А.</text:span></text:p>
      <text:p text:style-name="P10">Козлов Сергій Олександрович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3">Київ – 20</text:span><text:span text:style-name="T10">26</text:span></text:p>
      <text:h text:style-name="P12" text:outline-level="1"><text:soft-page-break/>Загальне завдання</text:h>
      <text:p text:style-name="P13"><text:tab/>Завдання лабораторної роботи наступне: розширити реалізовану у лабораторній роботі №3 програму мовою C або C++, таким чином, щоб крім зчитування послідовності команд (програми) з файлу, програма також виконувала заміну віртуальних адрес на фізичні в командах, що визначаються варіантом. Заміна відбувається в залежності від типу організації віртуальної пам’яті, який також визначається варіантом. Заміна адреси відбувається у випадку, якщо сторінка та/або сегмент знаходиться в оперативній пам’яті (ОП). Якщо потрібна віртуальна сторінка та/або сегмент відсутні в ОП, тоді має бути виведене повідомлення про помилку відсутності сторінки/сегменту, й аналіз команд має бути продовжено. Таблиця сторінок/сегментів задається у файлі формату CSV.</text:p>
      <text:p text:style-name="P13"><text:tab/>Розширення програми з л.р. №3 складатиметься з наступних компонентів:</text:p>
      <text:list text:style-name="L1">
        <text:list-item>
          <text:p text:style-name="P14">Модуль зчитування таблиці сторінок/сегментів з файлу CSV і створення внутрішнього представлення відповідної таблиці (або таблиць);</text:p>
        </text:list-item>
        <text:list-item>
          <text:p text:style-name="P14">Змінений модуль з зчитування і аналізу команд з текстового файлу, що також виконує заміну віртуальних адрес в зчитаних командах на фізичні;</text:p>
        </text:list-item>
        <text:list-item>
          <text:p text:style-name="P14">Змінений/розширений модуль тестування, що містить тестові утиліти і тести реалізованої програми.</text:p>
        </text:list-item>
      </text:list>
      <text:h text:style-name="P12" text:outline-level="1">Завдання за варіантом <text:span text:style-name="T11">6</text:span></text:h>
      <text:p text:style-name="P15"><text:span text:style-name="T12">Т</text:span>ип організації пам’яті: сегментно-сторінкова</text:p>
      <text:p text:style-name="P15">Розмір сторінки: <text:span text:style-name="T13">1 </text:span>Кбайт</text:p>
      <text:p text:style-name="P15">Розмір таблиці дескрипторів <text:span text:style-name="T14">сегментів</text:span>: <text:span text:style-name="T15">4096 </text:span><text:span text:style-name="T16">записів</text:span></text:p>
      <text:h text:style-name="Heading_20_1" text:outline-level="1"><text:span text:style-name="T1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2-14T12:50:33.771036030</meta:creation-date>
    <meta:generator>LibreOffice/25.8.6.2$Windows_X86_64 LibreOffice_project/b4b39682cd9868fa725bc664aff94278d315bd04</meta:generator>
    <dc:date>2026-06-13T19:46:05.182455700</dc:date>
    <meta:editing-duration>PT1H2M30S</meta:editing-duration>
    <meta:editing-cycles>13</meta:editing-cycles>
    <meta:document-statistic meta:table-count="0" meta:image-count="0" meta:object-count="0" meta:page-count="2" meta:paragraph-count="23" meta:word-count="221" meta:character-count="1745" meta:non-whitespace-character-count="1535"/>
  </office:meta>
</office:document-meta>
</file>