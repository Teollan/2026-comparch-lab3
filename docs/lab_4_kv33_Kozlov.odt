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D0000009D0C7EDD05.png" manifest:media-type="image/png"/>
  <manifest:file-entry manifest:full-path="Pictures/10000001000003DD0000020A17434D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b00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language="uk" fo:country="UA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8" style:family="paragraph" style:parent-style-name="Standard">
      <style:text-properties style:font-name="Liberation Serif" fo:font-size="14pt" fo:language="uk" fo:country="UA" fo:background-color="transparent" style:font-size-asian="14pt" style:font-size-complex="14pt"/>
    </style:style>
    <style:style style:name="P9" style:family="paragraph" style:parent-style-name="Standard">
      <style:text-properties fo:language="uk" fo:country="UA" fo:background-color="transparent"/>
    </style:style>
    <style:style style:name="P10" style:family="paragraph" style:parent-style-name="Standard">
      <style:text-properties style:font-name="Liberation Serif" fo:font-size="14pt" fo:language="uk" fo:country="UA" officeooo:rsid="00183067" officeooo:paragraph-rsid="00183067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Heading_20_1">
      <style:text-properties style:font-name="Liberation Serif" fo:language="uk" fo:country="UA"/>
    </style:style>
    <style:style style:name="P13" style:family="paragraph" style:parent-style-name="Text_20_body">
      <style:paragraph-properties fo:text-align="justify" style:justify-single-word="false"/>
      <style:text-properties fo:language="uk" fo:country="UA" officeooo:rsid="011d322d" officeooo:paragraph-rsid="00183067" style:script-type="latin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uk" fo:country="UA" officeooo:rsid="011d322d" officeooo:paragraph-rsid="00183067" style:script-type="latin"/>
    </style:style>
    <style:style style:name="P15" style:family="paragraph" style:parent-style-name="Text_20_body">
      <style:text-properties style:font-name="Liberation Serif" fo:language="uk" fo:country="UA" officeooo:rsid="00183067" officeooo:paragraph-rsid="00183067" fo:background-color="transparent"/>
    </style:style>
    <style:style style:name="P16" style:family="paragraph" style:parent-style-name="Heading_20_1" style:list-style-name="">
      <style:text-properties style:font-name="Liberation Serif" fo:font-size="18.2000007629395pt" fo:language="uk" fo:country="UA" fo:font-weight="bold" officeooo:rsid="000cc8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7" style:family="paragraph" style:parent-style-name="Text_20_body">
      <style:paragraph-properties fo:break-before="page"/>
      <style:text-properties style:font-name="Liberation Serif" fo:font-size="18.2000007629395pt" fo:language="uk" fo:country="UA" fo:font-weight="bold" officeooo:rsid="001c732c" officeooo:paragraph-rsid="001c732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8" style:family="paragraph" style:parent-style-name="Text_20_body">
      <style:text-properties style:font-name="Liberation Serif" fo:font-size="14pt" fo:language="uk" fo:country="UA" fo:font-style="normal" fo:font-weight="bold" officeooo:rsid="001ee65c" officeooo:paragraph-rsid="001ee65c" style:font-name-asian="Noto Sans CJK SC" style:font-size-asian="12.25pt" style:font-style-asian="normal" style:font-weight-asian="bold" style:font-name-complex="Lohit Devanagari1" style:font-size-complex="14pt" style:font-style-complex="normal" style:font-weight-complex="bold"/>
    </style:style>
    <style:style style:name="P19" style:family="paragraph" style:parent-style-name="Text_20_body">
      <style:text-properties style:font-name="Liberation Serif" fo:font-size="14pt" fo:language="uk" fo:country="UA" fo:font-style="normal" fo:font-weight="bold" officeooo:rsid="001ee65c" officeooo:paragraph-rsid="001f51bf" style:font-name-asian="Noto Sans CJK SC" style:font-size-asian="12.25pt" style:font-style-asian="normal" style:font-weight-asian="bold" style:font-name-complex="Lohit Devanagari1" style:font-size-complex="14pt" style:font-style-complex="normal" style:font-weight-complex="bold"/>
    </style:style>
    <style:style style:name="P20" style:family="paragraph" style:parent-style-name="Text_20_body">
      <style:text-properties style:font-name="Liberation Serif" fo:font-size="12pt" fo:language="uk" fo:country="UA" fo:font-style="normal" fo:font-weight="bold" officeooo:rsid="001dd8dc" officeooo:paragraph-rsid="001f51bf" style:font-name-asian="Noto Sans CJK SC" style:font-size-asian="10.5pt" style:font-style-asian="normal" style:font-weight-asian="bold" style:font-name-complex="Lohit Devanagari1" style:font-size-complex="12pt" style:font-style-complex="normal" style:font-weight-complex="bold"/>
    </style:style>
    <style:style style:name="P21" style:family="paragraph" style:parent-style-name="Text_20_body">
      <style:text-properties style:font-name="Liberation Serif" fo:font-size="12pt" fo:language="en" fo:country="US" fo:font-style="italic" fo:font-weight="normal" officeooo:rsid="001dd8dc" officeooo:paragraph-rsid="001dd8dc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Mono" fo:font-size="10pt" fo:language="en" fo:country="US" fo:font-style="normal" fo:font-weight="normal" officeooo:rsid="001dd8dc" officeooo:paragraph-rsid="001dd8dc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Liberation Mono" fo:font-size="10pt" fo:language="en" fo:country="US" fo:font-style="normal" fo:font-weight="normal" officeooo:rsid="001dd8dc" officeooo:paragraph-rsid="001dd8dc" fo:background-color="transparent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Liberation Mono" fo:font-size="10pt" fo:font-style="normal" fo:font-weight="normal" fo:background-color="transparent" style:font-size-asian="10pt" style:font-style-asian="normal" style:font-size-complex="10pt" style:font-style-complex="normal"/>
    </style:style>
    <style:style style:name="P2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6" style:family="paragraph" style:parent-style-name="Standard">
      <style:text-properties style:use-window-font-color="true" loext:opacity="0%" style:font-name="Liberation Mono" fo:font-size="10pt" fo:language="en" fo:country="US" fo:font-style="italic" fo:font-weight="normal" officeooo:rsid="001dd8dc" officeooo:paragraph-rsid="001dd8dc" fo:background-color="transparent" style:font-name-asian="Noto Sans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Liberation Mono" fo:font-size="10pt" fo:font-weight="normal" fo:background-color="transparent" style:font-size-asian="10pt" style:font-size-complex="10pt"/>
    </style:style>
    <style:style style:name="P28" style:family="paragraph" style:parent-style-name="Standard">
      <style:paragraph-properties style:line-height-at-least="0.503cm"/>
      <style:text-properties style:use-window-font-color="true" loext:opacity="0%" style:font-name="Liberation Mono" fo:font-size="10pt" fo:font-weight="normal" fo:background-color="transparent" style:font-size-asian="10pt" style:font-size-complex="10pt"/>
    </style:style>
    <style:style style:name="P29" style:family="paragraph" style:parent-style-name="Text_20_body">
      <style:text-properties style:font-name="Liberation Serif" fo:font-size="12pt" fo:language="uk" fo:country="UA" fo:font-style="normal" fo:font-weight="bold" officeooo:rsid="001f51bf" officeooo:paragraph-rsid="001f51bf" style:font-name-asian="Noto Sans CJK SC" style:font-size-asian="10.5pt" style:font-style-asian="normal" style:font-weight-asian="bold" style:font-name-complex="Lohit Devanagari1" style:font-size-complex="12pt" style:font-style-complex="normal" style:font-weight-complex="bold"/>
    </style:style>
    <style:style style:name="P30" style:family="paragraph" style:parent-style-name="Text_20_body">
      <style:text-properties style:font-name="Liberation Mono" fo:font-size="10pt" fo:language="en" fo:country="US" fo:font-style="italic" fo:font-weight="normal" officeooo:rsid="001dd8dc" officeooo:paragraph-rsid="001dd8dc" style:font-name-asian="Noto Sans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31" style:family="paragraph" style:parent-style-name="Text_20_body">
      <style:text-properties style:font-name="Liberation Serif" fo:font-size="12pt" fo:language="uk" fo:country="UA" fo:font-style="normal" fo:font-weight="bold" officeooo:rsid="001dd8dc" officeooo:paragraph-rsid="001dd8dc" style:font-name-asian="Noto Sans CJK SC" style:font-size-asian="10.5pt" style:font-style-asian="normal" style:font-weight-asian="bold" style:font-name-complex="Lohit Devanagari1" style:font-size-complex="12pt" style:font-style-complex="normal" style:font-weight-complex="bold"/>
    </style:style>
    <style:style style:name="P32" style:family="paragraph" style:parent-style-name="Text_20_body">
      <style:text-properties style:font-name="Liberation Serif" fo:font-size="12pt" fo:language="uk" fo:country="UA" fo:font-style="italic" fo:font-weight="normal" officeooo:rsid="001dd8dc" officeooo:paragraph-rsid="001dd8dc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language="uk" fo:country="UA" style:font-size-asian="14pt" style:font-size-complex="14pt"/>
    </style:style>
    <style:style style:name="T4" style:family="text">
      <style:text-properties style:font-name="Liberation Serif" fo:font-size="14pt" fo:language="en" fo:country="US" fo:font-weight="bold" officeooo:rsid="0018306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style:font-name="Liberation Serif" fo:font-size="14pt" fo:language="uk" fo:country="UA" officeooo:rsid="0010d7d8" style:font-size-asian="14pt" style:font-size-complex="14pt"/>
    </style:style>
    <style:style style:name="T6" style:family="text">
      <style:text-properties officeooo:rsid="0008ee54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08ee54" style:font-size-asian="14pt" style:font-size-complex="14pt"/>
    </style:style>
    <style:style style:name="T9" style:family="text">
      <style:text-properties style:font-name="Liberation Serif" fo:font-size="14pt" fo:language="en" fo:country="US" officeooo:rsid="00183067" style:font-size-asian="14pt" style:font-size-complex="14pt"/>
    </style:style>
    <style:style style:name="T10" style:family="text">
      <style:text-properties style:font-name="Liberation Serif" fo:font-size="14pt" fo:language="uk" fo:country="UA" officeooo:rsid="00183067" style:font-size-asian="14pt" style:font-size-complex="14pt"/>
    </style:style>
    <style:style style:name="T11" style:family="text">
      <style:text-properties officeooo:rsid="00183067"/>
    </style:style>
    <style:style style:name="T12" style:family="text">
      <style:text-properties officeooo:rsid="012501c0"/>
    </style:style>
    <style:style style:name="T13" style:family="text">
      <style:text-properties fo:language="en" fo:country="US"/>
    </style:style>
    <style:style style:name="T14" style:family="text">
      <style:text-properties officeooo:rsid="001b9b4c"/>
    </style:style>
    <style:style style:name="T15" style:family="text">
      <style:text-properties fo:language="en" fo:country="US" officeooo:rsid="00196d2e"/>
    </style:style>
    <style:style style:name="T16" style:family="text">
      <style:text-properties officeooo:rsid="00196d2e"/>
    </style:style>
    <style:style style:name="T17" style:family="text">
      <style:text-properties officeooo:rsid="001dd8dc"/>
    </style:style>
    <style:style style:name="T18" style:family="text">
      <style:text-properties fo:language="en" fo:country="US" officeooo:rsid="001f51bf"/>
    </style:style>
    <style:style style:name="T19" style:family="text">
      <style:text-properties officeooo:rsid="001f51bf"/>
    </style:style>
    <style:style style:name="T20" style:family="text">
      <style:text-properties officeooo:rsid="001e89ed"/>
    </style:style>
    <style:style style:name="T21" style:family="text">
      <style:text-properties fo:language="uk" fo:country="UA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2"><text:span text:style-name="T1">Факультет </text:span><text:span text:style-name="T2">прикладної математики</text:span></text:p>
      <text:p text:style-name="P3"><text:span text:style-name="T1">Кафедра </text:span><text:span text:style-name="T2">системного програмування</text:span></text:p>
      <text:p text:style-name="P4">і спеціалізованих комп’ютерних систем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itle"><text:span text:style-name="T3">Лабораторна робота №</text:span><text:span text:style-name="T4">4</text:span></text:p>
      <text:p text:style-name="P6">з дисципліни</text:p>
      <text:p text:style-name="P2"><text:span text:style-name="T3">«</text:span><text:span text:style-name="T5">Архітектура для програмістів</text:span><text:span text:style-name="T3">»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Виконав:<text:tab/><text:tab/><text:tab/><text:tab/><text:tab/><text:tab/><text:tab/><text:tab/>Перевіри<text:span text:style-name="T6">в</text:span>:</text:p>
      <text:p text:style-name="P9"><text:span text:style-name="T7">студент групи </text:span><text:span text:style-name="T8">КВ</text:span><text:span text:style-name="T7">-</text:span><text:span text:style-name="T9">33</text:span><text:span text:style-name="T7"><text:tab/><text:tab/><text:tab/><text:tab/><text:tab/><text:tab/></text:span><text:span text:style-name="T8">Молчанов О</text:span><text:span text:style-name="T7">. А.</text:span></text:p>
      <text:p text:style-name="P10">Козлов Сергій Олександрович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3">Київ – 20</text:span><text:span text:style-name="T10">26</text:span></text:p>
      <text:h text:style-name="P12" text:outline-level="1"><text:soft-page-break/>Загальне завдання</text:h>
      <text:p text:style-name="P13"><text:tab/>Завдання лабораторної роботи наступне: розширити реалізовану у лабораторній роботі №3 програму мовою C або C++, таким чином, щоб крім зчитування послідовності команд (програми) з файлу, програма також виконувала заміну віртуальних адрес на фізичні в командах, що визначаються варіантом. Заміна відбувається в залежності від типу організації віртуальної пам’яті, який також визначається варіантом. Заміна адреси відбувається у випадку, якщо сторінка та/або сегмент знаходиться в оперативній пам’яті (ОП). Якщо потрібна віртуальна сторінка та/або сегмент відсутні в ОП, тоді має бути виведене повідомлення про помилку відсутності сторінки/сегменту, й аналіз команд має бути продовжено. Таблиця сторінок/сегментів задається у файлі формату CSV.</text:p>
      <text:p text:style-name="P13"><text:tab/>Розширення програми з л.р. №3 складатиметься з наступних компонентів:</text:p>
      <text:list text:style-name="L1">
        <text:list-item>
          <text:p text:style-name="P14">Модуль зчитування таблиці сторінок/сегментів з файлу CSV і створення внутрішнього представлення відповідної таблиці (або таблиць);</text:p>
        </text:list-item>
        <text:list-item>
          <text:p text:style-name="P14">Змінений модуль з зчитування і аналізу команд з текстового файлу, що також виконує заміну віртуальних адрес в зчитаних командах на фізичні;</text:p>
        </text:list-item>
        <text:list-item>
          <text:p text:style-name="P14">Змінений/розширений модуль тестування, що містить тестові утиліти і тести реалізованої програми.</text:p>
        </text:list-item>
      </text:list>
      <text:h text:style-name="P12" text:outline-level="1">Завдання за варіантом <text:span text:style-name="T11">6</text:span></text:h>
      <text:p text:style-name="P15"><text:span text:style-name="T12">Т</text:span>ип організації пам’яті: сегментно-сторінкова</text:p>
      <text:p text:style-name="P15">Розмір сторінки: <text:span text:style-name="T13">1 </text:span>Кбайт</text:p>
      <text:p text:style-name="P15">Розмір таблиці дескрипторів <text:span text:style-name="T14">сегментів</text:span>: <text:span text:style-name="T15">4096 </text:span><text:span text:style-name="T16">записів</text:span></text:p>
      <text:h text:style-name="P16" text:outline-level="1"/>
      <text:p text:style-name="P17">Результат<text:span text:style-name="T17">и тестування програми</text:span></text:p>
      <text:p text:style-name="P18">Результати <text:span text:style-name="T13">Unit-</text:span>тестування <text:span text:style-name="T13">(GTest)</text:span></text:p>
      <text:p text:style-name="P19"><draw:frame draw:style-name="fr1" draw:name="Image2" text:anchor-type="char" svg:width="10.435cm" svg:height="3.323cm" draw:z-index="1"><draw:image xlink:href="Pictures/10000001000001ED0000009D0C7EDD05.png" xlink:type="simple" xlink:show="embed" xlink:actuate="onLoad" draw:mime-type="image/png"/></draw:frame>Результати <text:span text:style-name="T18">E2E</text:span><text:span text:style-name="T13">-</text:span>тестування</text:p>
      <text:p text:style-name="P20"><text:span text:style-name="T19">В</text:span><text:span text:style-name="T20">хідні</text:span> <text:span text:style-name="T20">дані</text:span></text:p>
      <text:p text:style-name="P21">./examples/example-program.hex (<text:span text:style-name="T21">вхідний файл програми</text:span>)</text:p>
      <text:p text:style-name="P22">// Структура віртуальної адреси: <text:s/>[ segment : 12 ][ page : 10 ][ offset : 10 ]</text:p>
      <text:p text:style-name="P22">// Структура фізичної адреси: <text:s text:c="4"/>[ frame : 22 <text:s text:c="15"/>][ offset : 10 ]</text:p>
      <text:p text:style-name="P22"/>
      <text:p text:style-name="P22">// [0][0][42] -&gt; кадр 16, в пам'яті</text:p>
      <text:p text:style-name="P22">1B 01 00 00 00 2A <text:s text:c="2"/>// MOV R1, [0x0000002A] -&gt; [0x0000402A]</text:p>
      <text:p text:style-name="P22"/>
      <text:p text:style-name="P22">// [1][0][256] -&gt; кадр 32, в пам'яті</text:p>
      <text:p text:style-name="P22">04 34 00 10 01 00 <text:s text:c="2"/>// ADD R3, R4, [0x00100100] -&gt; [0x00008100]</text:p>
      <text:p text:style-name="P22"/>
      <text:p text:style-name="P22">// [1][1][85] -&gt; сторінка вивантажена</text:p>
      <text:p text:style-name="P22">0B 05 00 10 04 55 <text:s text:c="2"/>// SUB R5, [0x00100455] -&gt; вивантажена сторінка</text:p>
      <text:p text:style-name="P22"/>
      <text:p text:style-name="P22">// [2][123][0] -&gt; стор. 123 за межами 4 сторінок сегмента</text:p>
      <text:p text:style-name="P22">1B 16 00 21 EC 00 <text:s text:c="2"/>// MOV [0x0021EC00], R6 -&gt; відсутня сторінка</text:p>
      <text:p text:style-name="P22"/>
      <text:p text:style-name="P22">// [42][0][0] -&gt; сегмента 42 немає в таблиці сегментів</text:p>
      <text:p text:style-name="P22">1B 07 02 A0 00 00 <text:s text:c="2"/>// MOV R7, [0x02A00000] -&gt; відсутній сегмент</text:p>
      <text:p text:style-name="P22"/>
      <text:p text:style-name="P22">// [3][0][171] -&gt; кадр 1023, в пам'яті</text:p>
      <text:p text:style-name="P22">0B 08 00 30 00 AB <text:s text:c="2"/>// SUB R8, [0x003000AB] -&gt; [0x000FFCAB]</text:p>
      <text:p text:style-name="P22"/>
      <text:p text:style-name="P21">./examples/example-segments.csv (<text:span text:style-name="T21">таблиця сегментів</text:span>)</text:p>
      <text:p text:style-name="P23">examples/example-pages-0.csv,4</text:p>
      <text:p text:style-name="P24">examples/example-pages-1.csv,3</text:p>
      <text:p text:style-name="P24">examples/example-pages-2.csv,4</text:p>
      <text:p text:style-name="P24">examples/example-pages-3.csv,2</text:p>
      <text:p text:style-name="P25"/>
      <text:p text:style-name="P21">./examples/example-pages-0.csv (<text:span text:style-name="T21">таблиця сторінок сегменту 0</text:span>)</text:p>
      <text:p text:style-name="P26">0,1,16</text:p>
      <text:p text:style-name="P27">1,1,17</text:p>
      <text:p text:style-name="P27">2,1,18</text:p>
      <text:p text:style-name="P27">3,1,19</text:p>
      <text:p text:style-name="P25"><text:soft-page-break/></text:p>
      <text:p text:style-name="P21">./examples/example-pages-1.csv (<text:span text:style-name="T21">таблиця сторінок сегменту </text:span>1)</text:p>
      <text:p text:style-name="P26">0,1,32</text:p>
      <text:p text:style-name="P27">1,0,00</text:p>
      <text:p text:style-name="P27">2,1,34</text:p>
      <text:p text:style-name="P27"/>
      <text:p text:style-name="P21">./examples/example-pages-2.csv (<text:span text:style-name="T21">таблиця сторінок сегменту </text:span>2)</text:p>
      <text:p text:style-name="P26">0,1,48</text:p>
      <text:p text:style-name="P27">1,1,49</text:p>
      <text:p text:style-name="P27">2,1,50</text:p>
      <text:p text:style-name="P27">3,1,51</text:p>
      <text:p text:style-name="P27"/>
      <text:p text:style-name="P21">./examples/example-pages-3.csv (<text:span text:style-name="T21">таблиця сторінок сегменту </text:span>3)</text:p>
      <text:p text:style-name="P26">0,1,1023</text:p>
      <text:p text:style-name="P27">1,1,683</text:p>
      <text:p text:style-name="P28"/>
      <text:p text:style-name="P29">Виклик програми</text:p>
      <text:p text:style-name="P30">app.exe -x -i ./examples/example-program.hex -s ./examples/example-segments.csv</text:p>
      <text:p text:style-name="P31">Результат виконання</text:p>
      <text:p text:style-name="P32"><draw:frame draw:style-name="fr2" draw:name="Image1" text:anchor-type="char" svg:width="17.59cm" svg:height="9.282cm" draw:z-index="0"><draw:image xlink:href="Pictures/10000001000003DD0000020A17434D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2-14T12:50:33.771036030</meta:creation-date>
    <meta:generator>LibreOffice/25.8.6.2$Windows_X86_64 LibreOffice_project/b4b39682cd9868fa725bc664aff94278d315bd04</meta:generator>
    <dc:date>2026-06-14T17:18:27.061345400</dc:date>
    <meta:editing-duration>PT1H18M34S</meta:editing-duration>
    <meta:editing-cycles>17</meta:editing-cycles>
    <meta:document-statistic meta:table-count="0" meta:image-count="2" meta:object-count="0" meta:page-count="4" meta:paragraph-count="67" meta:word-count="436" meta:character-count="3293" meta:non-whitespace-character-count="2880"/>
  </office:meta>
</office:document-meta>
</file>