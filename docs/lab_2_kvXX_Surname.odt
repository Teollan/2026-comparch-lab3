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75in" table:align="left"/>
    </style:style>
    <style:style style:name="Table2.A" style:family="table-column">
      <style:table-column-properties style:column-width="0.3764in"/>
    </style:style>
    <style:style style:name="Table2.B" style:family="table-column">
      <style:table-column-properties style:column-width="1.3701in"/>
    </style:style>
    <style:style style:name="Table2.C" style:family="table-column">
      <style:table-column-properties style:column-width="1.3146in"/>
    </style:style>
    <style:style style:name="Table2.D" style:family="table-column">
      <style:table-column-properties style:column-width="2.3799in"/>
    </style:style>
    <style:style style:name="Table2.E" style:family="table-column">
      <style:table-column-properties style:column-width="1.434in"/>
    </style:style>
    <style:style style:name="Table2.F" style:family="table-column">
      <style:table-column-properties style:column-width="2.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b00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language="uk" fo:country="UA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8" style:family="paragraph" style:parent-style-name="Standard">
      <style:text-properties fo:language="uk" fo:country="UA"/>
    </style:style>
    <style:style style:name="P9" style:family="paragraph" style:parent-style-name="Standard">
      <style:text-properties style:font-name="Liberation Serif" fo:font-size="14pt" fo:language="uk" fo:country="UA" fo:background-color="#ffff00" style:font-size-asian="14pt" style:font-size-complex="14pt"/>
    </style:style>
    <style:style style:name="P10" style:family="paragraph" style:parent-style-name="Heading_20_1">
      <style:text-properties style:font-name="Liberation Serif" fo:language="uk" fo:country="UA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79ce7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uk" fo:country="UA" officeooo:rsid="011d322d" officeooo:paragraph-rsid="00179ce7" style:script-type="latin"/>
    </style:style>
    <style:style style:name="P13" style:family="paragraph" style:parent-style-name="Text_20_body">
      <style:text-properties style:font-name="Liberation Serif" fo:language="uk" fo:country="UA" officeooo:paragraph-rsid="0008ee54"/>
    </style:style>
    <style:style style:name="P14" style:family="paragraph" style:parent-style-name="Text_20_body">
      <style:text-properties style:font-name="Liberation Serif" fo:language="uk" fo:country="UA" officeooo:rsid="0008ee54" officeooo:paragraph-rsid="0008ee54" fo:background-color="#ffff00"/>
    </style:style>
    <style:style style:name="P15" style:family="paragraph" style:parent-style-name="Code">
      <style:text-properties officeooo:paragraph-rsid="0010d7d8"/>
    </style:style>
    <style:style style:name="P16" style:family="paragraph" style:parent-style-name="Code">
      <style:text-properties style:font-name="Liberation Mono" fo:font-size="10pt" fo:language="uk" fo:country="UA" officeooo:rsid="0008ee54" officeooo:paragraph-rsid="0010d7d8" style:font-size-asian="10pt" style:font-size-complex="10pt"/>
    </style:style>
    <style:style style:name="P17" style:family="paragraph" style:parent-style-name="Code">
      <style:text-properties officeooo:rsid="016d0fc1" officeooo:paragraph-rsid="0010d7d8"/>
    </style:style>
    <style:style style:name="P18" style:family="paragraph" style:parent-style-name="Code">
      <style:text-properties officeooo:rsid="016e2707" officeooo:paragraph-rsid="0010d7d8"/>
    </style:style>
    <style:style style:name="P19" style:family="paragraph" style:parent-style-name="Code">
      <style:text-properties style:font-name="Liberation Mono" fo:language="uk" fo:country="UA" officeooo:rsid="000cc817" officeooo:paragraph-rsid="0010d7d8"/>
    </style:style>
    <style:style style:name="P20" style:family="paragraph" style:parent-style-name="Heading_20_1">
      <style:text-properties style:font-name="Liberation Serif" fo:language="uk" fo:country="UA" officeooo:rsid="000cc817" officeooo:paragraph-rsid="000cc817"/>
    </style:style>
    <style:style style:name="P21" style:family="paragraph" style:parent-style-name="Text_20_body">
      <style:text-properties style:font-name="Liberation Serif" fo:language="uk" fo:country="UA" officeooo:rsid="000cc817" officeooo:paragraph-rsid="000cc817"/>
    </style:style>
    <style:style style:name="P22" style:family="paragraph" style:parent-style-name="Heading_20_1" style:master-page-name="Landscape">
      <style:paragraph-properties style:page-number="auto"/>
      <style:text-properties style:font-name="Liberation Serif" fo:language="uk" fo:country="UA" officeooo:rsid="000cc817" officeooo:paragraph-rsid="000cc817"/>
    </style:style>
    <style:style style:name="P23" style:family="paragraph" style:parent-style-name="Text_20_body">
      <style:text-properties officeooo:paragraph-rsid="000ea863"/>
    </style:style>
    <style:style style:name="P24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0ea86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0ea86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0ea86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fo:language="uk" fo:country="UA" officeooo:rsid="018355d7" officeooo:paragraph-rsid="000ea863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paragraph-rsid="000ea863" style:font-size-asian="10pt" style:font-size-complex="10pt"/>
    </style:style>
    <style:style style:name="P29" style:family="paragraph" style:parent-style-name="Code">
      <style:paragraph-properties fo:text-align="justify" style:justify-single-word="false"/>
      <style:text-properties style:font-name="Liberation Mono" fo:font-size="10pt" fo:language="uk" fo:country="UA" officeooo:paragraph-rsid="000ea863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language="uk" fo:country="UA" officeooo:rsid="017541e9" officeooo:paragraph-rsid="000ea863"/>
    </style:style>
    <style:style style:name="P31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541e9" officeooo:paragraph-rsid="000ea863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officeooo:paragraph-rsid="000ea863"/>
    </style:style>
    <style:style style:name="P33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0ea863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language="uk" fo:country="UA" officeooo:rsid="0179d331" officeooo:paragraph-rsid="000ea863"/>
    </style:style>
    <style:style style:name="P35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8355d7" officeooo:paragraph-rsid="000ea863" style:font-size-asian="10pt" style:font-size-complex="10pt"/>
    </style:style>
    <style:style style:name="P36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355d7" officeooo:paragraph-rsid="000ea863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fo:font-size="12pt" fo:language="uk" fo:country="UA" officeooo:rsid="018355d7" officeooo:paragraph-rsid="000ea863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fo:language="uk" fo:country="UA" officeooo:rsid="01843a68" officeooo:paragraph-rsid="000ea863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843a68" officeooo:paragraph-rsid="000ea863" style:font-size-asian="10pt" style:font-size-complex="10pt"/>
    </style:style>
    <style:style style:name="P40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43a68" officeooo:paragraph-rsid="000ea863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fo:language="uk" fo:country="UA" officeooo:rsid="01854a97" officeooo:paragraph-rsid="000ea863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a404c" officeooo:paragraph-rsid="000ea863" style:font-size-asian="10pt" style:font-size-complex="10pt"/>
    </style:style>
    <style:style style:name="P43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7a404c" officeooo:paragraph-rsid="000ea863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fo:language="uk" fo:country="UA" officeooo:rsid="017a404c" officeooo:paragraph-rsid="000ea863"/>
    </style:style>
    <style:style style:name="P45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ba63e" officeooo:paragraph-rsid="000ea863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paragraph-rsid="0015d20c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language="uk" fo:country="UA" officeooo:rsid="017ba63e" officeooo:paragraph-rsid="0015d20c"/>
    </style:style>
    <style:style style:name="P48" style:family="paragraph" style:parent-style-name="Table_20_Contents">
      <style:paragraph-properties fo:text-align="justify" style:justify-single-word="false"/>
      <style:text-properties fo:language="uk" fo:country="UA" officeooo:paragraph-rsid="0015d20c"/>
    </style:style>
    <style:style style:name="P49" style:family="paragraph" style:parent-style-name="Standard">
      <style:text-properties officeooo:paragraph-rsid="000ea863"/>
    </style:style>
    <style:style style:name="T1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language="uk" fo:country="UA" style:font-size-asian="14pt" style:font-size-complex="14pt"/>
    </style:style>
    <style:style style:name="T4" style:family="text">
      <style:text-properties style:font-name="Liberation Serif" fo:font-size="14pt" fo:language="uk" fo:country="UA" fo:font-weight="bold" officeooo:rsid="000cc81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style:font-name="Liberation Serif" fo:font-size="14pt" fo:language="uk" fo:country="UA" officeooo:rsid="0010d7d8" style:font-size-asian="14pt" style:font-size-complex="14pt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8ee54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fo:background-color="#ffff00" loext:char-shading-value="0" style:font-size-asian="14pt" style:font-size-complex="14pt"/>
    </style:style>
    <style:style style:name="T10" style:family="text">
      <style:text-properties style:font-name="Liberation Serif" fo:font-size="14pt" officeooo:rsid="0008ee54" style:font-size-asian="14pt" style:font-size-complex="14pt"/>
    </style:style>
    <style:style style:name="T11" style:family="text">
      <style:text-properties style:font-name="Liberation Serif" fo:font-size="14pt" officeooo:rsid="0008ee54" fo:background-color="#ffff00" loext:char-shading-value="0" style:font-size-asian="14pt" style:font-size-complex="14pt"/>
    </style:style>
    <style:style style:name="T12" style:family="text">
      <style:text-properties style:font-name="Liberation Serif" fo:font-size="14pt" fo:language="uk" fo:country="UA" officeooo:rsid="001401a9" fo:background-color="#ffff00" loext:char-shading-value="0" style:font-size-asian="14pt" style:font-size-complex="14pt"/>
    </style:style>
    <style:style style:name="T13" style:family="text">
      <style:text-properties fo:language="uk" fo:country="UA" officeooo:rsid="011d322d"/>
    </style:style>
    <style:style style:name="T14" style:family="text">
      <style:text-properties fo:language="uk" fo:country="UA" officeooo:rsid="011bb7c0"/>
    </style:style>
    <style:style style:name="T15" style:family="text">
      <style:text-properties fo:language="uk" fo:country="UA" fo:font-style="normal" officeooo:rsid="01227888" style:font-style-asian="normal" style:font-style-complex="normal"/>
    </style:style>
    <style:style style:name="T16" style:family="text">
      <style:text-properties fo:language="uk" fo:country="UA" officeooo:rsid="011e22c2"/>
    </style:style>
    <style:style style:name="T17" style:family="text">
      <style:text-properties fo:language="uk" fo:country="UA" officeooo:rsid="014a6bf1"/>
    </style:style>
    <style:style style:name="T18" style:family="text">
      <style:text-properties fo:language="uk" fo:country="UA" fo:font-style="italic" officeooo:rsid="011d322d" style:font-style-asian="italic" style:font-style-complex="italic"/>
    </style:style>
    <style:style style:name="T19" style:family="text">
      <style:text-properties fo:language="uk" fo:country="UA" fo:font-weight="bold" officeooo:rsid="011d322d" style:font-weight-asian="bold" style:font-weight-complex="bold"/>
    </style:style>
    <style:style style:name="T20" style:family="text">
      <style:text-properties fo:language="uk" fo:country="UA" officeooo:rsid="015367bb"/>
    </style:style>
    <style:style style:name="T21" style:family="text">
      <style:text-properties fo:language="uk" fo:country="UA" fo:font-style="italic" officeooo:rsid="011e22c2" style:font-style-asian="italic" style:font-style-complex="italic"/>
    </style:style>
    <style:style style:name="T22" style:family="text">
      <style:text-properties fo:language="uk" fo:country="UA" officeooo:rsid="011f504d"/>
    </style:style>
    <style:style style:name="T23" style:family="text">
      <style:text-properties fo:language="uk" fo:country="UA" officeooo:rsid="018d38b0"/>
    </style:style>
    <style:style style:name="T24" style:family="text">
      <style:text-properties fo:language="uk" fo:country="UA" officeooo:rsid="011f504d" style:script-type="latin"/>
    </style:style>
    <style:style style:name="T25" style:family="text">
      <style:text-properties fo:language="uk" fo:country="UA" officeooo:rsid="018d38b0" style:script-type="latin"/>
    </style:style>
    <style:style style:name="T26" style:family="text">
      <style:text-properties officeooo:rsid="011bb7c0"/>
    </style:style>
    <style:style style:name="T27" style:family="text">
      <style:text-properties officeooo:rsid="011f504d"/>
    </style:style>
    <style:style style:name="T28" style:family="text">
      <style:text-properties officeooo:rsid="011e22c2"/>
    </style:style>
    <style:style style:name="T29" style:family="text">
      <style:text-properties officeooo:rsid="015367bb"/>
    </style:style>
    <style:style style:name="T30" style:family="text">
      <style:text-properties fo:font-style="italic" officeooo:rsid="011f504d" style:font-style-asian="italic" style:font-style-complex="italic"/>
    </style:style>
    <style:style style:name="T31" style:family="text">
      <style:text-properties officeooo:rsid="01210d98"/>
    </style:style>
    <style:style style:name="T32" style:family="text">
      <style:text-properties officeooo:rsid="01227604"/>
    </style:style>
    <style:style style:name="T33" style:family="text">
      <style:text-properties officeooo:rsid="0008ee54" fo:background-color="#ffff00" loext:char-shading-value="0"/>
    </style:style>
    <style:style style:name="T34" style:family="text">
      <style:text-properties officeooo:rsid="012501c0" fo:background-color="#ffff00" loext:char-shading-value="0"/>
    </style:style>
    <style:style style:name="T35" style:family="text">
      <style:text-properties style:font-name="Liberation Serif" fo:language="uk" fo:country="UA"/>
    </style:style>
    <style:style style:name="T36" style:family="text">
      <style:text-properties style:font-name="Liberation Serif" fo:font-size="18.2000007629395pt" fo:language="uk" fo:country="UA" fo:font-weight="bold" officeooo:rsid="000cc8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37" style:family="text">
      <style:text-properties officeooo:rsid="015be46a"/>
    </style:style>
    <style:style style:name="T38" style:family="text">
      <style:text-properties style:font-name="Liberation Mono" fo:font-size="10pt" fo:language="uk" fo:country="UA" officeooo:rsid="015cee9a" style:font-size-asian="10pt" style:font-size-complex="10pt"/>
    </style:style>
    <style:style style:name="T39" style:family="text">
      <style:text-properties officeooo:rsid="01360073"/>
    </style:style>
    <style:style style:name="T40" style:family="text">
      <style:text-properties style:font-name="Liberation Mono" fo:font-size="10pt" fo:language="uk" fo:country="UA" officeooo:rsid="01604406" style:font-size-asian="10pt" style:font-size-complex="10pt"/>
    </style:style>
    <style:style style:name="T41" style:family="text">
      <style:text-properties officeooo:rsid="000cc817"/>
    </style:style>
    <style:style style:name="T42" style:family="text">
      <style:text-properties fo:background-color="#b4c7dc" loext:char-shading-value="0"/>
    </style:style>
    <style:style style:name="T43" style:family="text">
      <style:text-properties officeooo:rsid="016bc168" fo:background-color="#b4c7dc" loext:char-shading-value="0"/>
    </style:style>
    <style:style style:name="T44" style:family="text">
      <style:text-properties officeooo:rsid="016d0fc1"/>
    </style:style>
    <style:style style:name="T45" style:family="text">
      <style:text-properties fo:background-color="#e8f2a1" loext:char-shading-value="0"/>
    </style:style>
    <style:style style:name="T46" style:family="text">
      <style:text-properties officeooo:rsid="016d0fc1" fo:background-color="#b4c7dc" loext:char-shading-value="0"/>
    </style:style>
    <style:style style:name="T47" style:family="text">
      <style:text-properties style:font-name="Liberation Mono" fo:font-size="10pt" fo:language="uk" fo:country="UA" officeooo:rsid="016d0fc1" style:font-size-asian="10pt" style:font-size-complex="10pt"/>
    </style:style>
    <style:style style:name="T48" style:family="text">
      <style:text-properties officeooo:rsid="016d0fc1" fo:background-color="#e8f2a1" loext:char-shading-value="0"/>
    </style:style>
    <style:style style:name="T49" style:family="text">
      <style:text-properties officeooo:rsid="0191443b" fo:background-color="#b4c7dc" loext:char-shading-value="0"/>
    </style:style>
    <style:style style:name="T50" style:family="text">
      <style:text-properties officeooo:rsid="016fe67a" fo:background-color="transparent" loext:char-shading-value="0"/>
    </style:style>
    <style:style style:name="T51" style:family="text">
      <style:text-properties officeooo:rsid="016e2707"/>
    </style:style>
    <style:style style:name="T52" style:family="text">
      <style:text-properties officeooo:rsid="016e2707" fo:background-color="#e8f2a1" loext:char-shading-value="0"/>
    </style:style>
    <style:style style:name="T53" style:family="text">
      <style:text-properties officeooo:rsid="016fe67a" fo:background-color="#b4c7dc" loext:char-shading-value="0"/>
    </style:style>
    <style:style style:name="T54" style:family="text">
      <style:text-properties officeooo:rsid="016fe67a"/>
    </style:style>
    <style:style style:name="T55" style:family="text">
      <style:text-properties officeooo:rsid="016fe67a" fo:background-color="#e8f2a1" loext:char-shading-value="0"/>
    </style:style>
    <style:style style:name="T56" style:family="text">
      <style:text-properties style:font-name="Liberation Serif" fo:language="uk" fo:country="UA" officeooo:rsid="000cc817" fo:background-color="#ffff00" loext:char-shading-value="0"/>
    </style:style>
    <style:style style:name="T57" style:family="text">
      <style:text-properties style:font-name="Liberation Serif" fo:language="uk" fo:country="UA" officeooo:rsid="000ea863" fo:background-color="#ffff00" loext:char-shading-value="0"/>
    </style:style>
    <style:style style:name="T58" style:family="text">
      <style:text-properties officeooo:rsid="018933a7"/>
    </style:style>
    <style:style style:name="T59" style:family="text">
      <style:text-properties style:font-name="Liberation Mono" fo:font-size="10pt" fo:language="uk" fo:country="UA" officeooo:rsid="017541e9" style:font-size-asian="10pt" style:font-size-complex="10pt"/>
    </style:style>
    <style:style style:name="T60" style:family="text">
      <style:text-properties style:font-name="Liberation Mono" fo:font-size="10pt" fo:language="uk" fo:country="UA" style:font-size-asian="10pt" style:font-size-complex="10pt"/>
    </style:style>
    <style:style style:name="T61" style:family="text">
      <style:text-properties style:font-name="Liberation Mono" fo:font-size="10pt" fo:language="uk" fo:country="UA" officeooo:rsid="018355d7" style:font-size-asian="10pt" style:font-size-complex="10pt"/>
    </style:style>
    <style:style style:name="T62" style:family="text">
      <style:text-properties style:font-name="Liberation Mono" fo:font-size="10pt" fo:language="uk" fo:country="UA" officeooo:rsid="01843a68" style:font-size-asian="10pt" style:font-size-complex="10pt"/>
    </style:style>
    <style:style style:name="T63" style:family="text">
      <style:text-properties style:font-name="Liberation Serif" fo:font-size="12pt" fo:language="uk" fo:country="UA" officeooo:rsid="018355d7" style:font-size-asian="12pt" style:font-size-complex="12pt"/>
    </style:style>
    <style:style style:name="T64" style:family="text">
      <style:text-properties style:font-name="Liberation Serif" fo:font-size="12pt" fo:language="uk" fo:country="UA" officeooo:rsid="01843a68" style:font-size-asian="12pt" style:font-size-complex="12pt"/>
    </style:style>
    <style:style style:name="T65" style:family="text">
      <style:text-properties officeooo:rsid="018355d7"/>
    </style:style>
    <style:style style:name="T66" style:family="text">
      <style:text-properties officeooo:rsid="01843a68"/>
    </style:style>
    <style:style style:name="T67" style:family="text">
      <style:text-properties officeooo:rsid="01897bf3"/>
    </style:style>
    <style:style style:name="T68" style:family="text">
      <style:text-properties officeooo:rsid="017a404c"/>
    </style:style>
    <style:style style:name="T69" style:family="text">
      <style:text-properties officeooo:rsid="0015d20c"/>
    </style:style>
    <style:style style:name="T70" style:family="text">
      <style:text-properties style:font-name="Liberation Mono" fo:font-size="10pt" officeooo:rsid="0015d20c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2"><text:span text:style-name="T1">Факультет </text:span><text:span text:style-name="T2">прикладної математики</text:span></text:p>
      <text:p text:style-name="P3"><text:span text:style-name="T1">Кафедра </text:span><text:span text:style-name="T2">системного програмування</text:span></text:p>
      <text:p text:style-name="P4">і спеціалізованих комп’ютерних систем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itle"><text:span text:style-name="T3">Лабораторна робота №</text:span><text:span text:style-name="T4">2</text:span></text:p>
      <text:p text:style-name="P6">з дисципліни</text:p>
      <text:p text:style-name="P2"><text:span text:style-name="T3">«</text:span><text:span text:style-name="T5">Архітектура для програмістів</text:span><text:span text:style-name="T3">»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Викона<text:span text:style-name="T6">в (або виконала)</text:span>:<text:tab/><text:tab/><text:tab/><text:tab/><text:tab/>Перевіри<text:span text:style-name="T7">в</text:span>:</text:p>
      <text:p text:style-name="P8"><text:span text:style-name="T8">студент</text:span><text:span text:style-name="T9"> (або студентка)</text:span><text:span text:style-name="T8"> групи </text:span><text:span text:style-name="T10">КВ</text:span><text:span text:style-name="T8">-</text:span><text:span text:style-name="T11">XX</text:span><text:span text:style-name="T8"><text:tab/><text:tab/><text:tab/></text:span><text:span text:style-name="T10">Молчанов О</text:span><text:span text:style-name="T8">. А.</text:span></text:p>
      <text:p text:style-name="P9">Денисенко Денис Денисович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Київ – 20</text:span><text:span text:style-name="T12">XX</text:span></text:p>
      <text:h text:style-name="P10" text:outline-level="1"><text:soft-page-break/>Загальне завдання</text:h>
      <text:list text:style-name="L1">
        <text:list-item>
          <text:p text:style-name="P11"><text:span text:style-name="T13">Р</text:span><text:span text:style-name="T14">еалізувати програму сортування масиву згідно із варіантом мовою Java </text:span><text:span text:style-name="T15">(інформація про варіанти наведена в п. 4)</text:span><text:span text:style-name="T14">. Програма, записана мовою Java, має бути синтаксично </text:span><text:span text:style-name="T16">і семантично </text:span><text:span text:style-name="T14">відповідна програмі, записаній мовою C (це досягається завдяки синтаксичній та семантичній подібності цих двох мов </text:span><text:span text:style-name="T16">для випадку даного завдання</text:span><text:span text:style-name="T14">), </text:span><text:span text:style-name="T17">що була реалізована в лабораторній роботі №1.</text:span><text:span text:style-name="T13"> </text:span><text:span text:style-name="T18">Результатом</text:span><text:span text:style-name="T13"> виконання цього пункту є лістинг програм</text:span><text:span text:style-name="T17">и мовою Java</text:span><text:span text:style-name="T13">.</text:span></text:p>
        </text:list-item>
        <text:list-item>
          <text:p text:style-name="P11"><text:span text:style-name="T14">В</text:span><text:span text:style-name="T13">иконати трансляцію програми, написаної мовою Java, у байт-код Java за допомогою </text:span><text:span text:style-name="T19">javac</text:span><text:span text:style-name="T13"> і </text:span><text:span text:style-name="T19">javap</text:span><text:span text:style-name="T13"> (програми, що постачаються разом з пакетом openjdk) й встановити семантичну відповідність між командами мови Java та командами одержаного байт-коду Java </text:span><text:span text:style-name="T20">шляхом додавання коментарів з поясненням</text:span><text:span text:style-name="T13">. </text:span><text:span text:style-name="T21">Результатом</text:span><text:span text:style-name="T16"> виконання даного пункту буде лістинг </text:span><text:span text:style-name="T22">байт-коду програми</text:span><text:span text:style-name="T16"> із коментарями в коді, в яких наведено відповідн</text:span><text:span text:style-name="T22">ий код</text:span><text:span text:style-name="T16"> програми, </text:span><text:span text:style-name="T22">записаної мовою</text:span><text:span text:style-name="T16"> </text:span><text:span text:style-name="T22">Java.</text:span></text:p>
        </text:list-item>
        <text:list-item>
          <text:p text:style-name="P11"><text:span text:style-name="T22">Розібратись і вміти пояснити, що виконують ті чи інші команди </text:span><text:span text:style-name="T23">байт-коду Java</text:span><text:span text:style-name="T22">, що будуть пр</text:span><text:span text:style-name="T24">исутні в </text:span><text:span text:style-name="T25">байт-коді програми</text:span><text:span text:style-name="T24">, отриманого в другому пункті загального завдання; вміти пояснити зв’язок між кодом мовою </text:span><text:span text:style-name="T25">Java</text:span><text:span text:style-name="T24"> та </text:span><text:span text:style-name="T25">байт-</text:span><text:span text:style-name="T24">кодом.</text:span></text:p>
        </text:list-item>
        <text:list-item>
          <text:p text:style-name="P12"><text:span text:style-name="T26">Виконати </text:span><text:span text:style-name="T27">порівняльний </text:span><text:span text:style-name="T26">аналі</text:span><text:span text:style-name="T28">з </text:span><text:span text:style-name="T27">відповідних семантичних частин програм, записаних мовою асемблера </text:span><text:span text:style-name="T29">(лабораторна робота №1)</text:span><text:span text:style-name="T27"> та байт-кодом. </text:span><text:span text:style-name="T30">Результатом</text:span><text:span text:style-name="T27"> </text:span><text:span text:style-name="T31">виконання даного пункту буде таблиця із порівнянням відповідних частин асемблерного коду та байт-коду</text:span><text:span text:style-name="T32">.</text:span></text:p>
        </text:list-item>
      </text:list>
      <text:h text:style-name="P10" text:outline-level="1">Завдання за варіантом <text:span text:style-name="T6">XX</text:span></text:h>
      <text:p text:style-name="P13"><text:tab/><text:span text:style-name="T33">Реалізувати функцію, що </text:span><text:span text:style-name="T34">визнач</text:span><text:span text:style-name="T33">ає</text:span><text:span text:style-name="T34"> суму парних чисел </text:span><text:span text:style-name="T33">у вхідному </text:span><text:span text:style-name="T34">масиві </text:span><text:span text:style-name="T33">заданої довжини</text:span><text:span text:style-name="T34">.</text:span></text:p>
      <text:h text:style-name="Heading_20_1" text:outline-level="1"><text:span text:style-name="T35">1. Лістинг програми мовою </text:span><text:span text:style-name="T36">Java</text:span></text:h>
      <text:p text:style-name="P14">(Наступний код відрізнятиметься в залежності від варіанту.)</text:p>
      <text:p text:style-name="P15"><text:s text:c="2"/>private static int calculateEvenSum(int[] arr, <text:span text:style-name="T37">int </text:span><text:span text:style-name="T38">size</text:span>) {</text:p>
      <text:p text:style-name="P15"><text:s text:c="4"/>int sum = 0;</text:p>
      <text:p text:style-name="P15"><text:s text:c="4"/>// <text:span text:style-name="T39">main loop</text:span></text:p>
      <text:p text:style-name="P15"><text:s text:c="4"/>for (int idx = 0; idx &lt; <text:span text:style-name="T38">size</text:span>; idx++) {</text:p>
      <text:p text:style-name="P15"><text:s text:c="6"/>if ((arr[idx] &amp; 1) <text:span text:style-name="T40">=</text:span>= 0) {</text:p>
      <text:p text:style-name="P15"><text:s text:c="8"/>sum += arr[idx];</text:p>
      <text:p text:style-name="P15"><text:s text:c="6"/>}</text:p>
      <text:p text:style-name="P15"><text:s text:c="4"/>}</text:p>
      <text:p text:style-name="P15"><text:s text:c="2"/></text:p>
      <text:p text:style-name="P15"><text:s text:c="4"/>return sum;</text:p>
      <text:p text:style-name="P16"><text:s text:c="2"/>}</text:p>
      <text:h text:style-name="P10" text:outline-level="1">2. Лістинг програми <text:span text:style-name="T41">байт-кодом Java</text:span> з поясненнями</text:h>
      <text:p text:style-name="P14">(Наступний код відрізнятиметься в залежності від варіанту.)</text:p>
      <text:p text:style-name="P15"><text:tab/>private static int calculateEvenSum(int[], int);</text:p>
      <text:p text:style-name="P15"><text:soft-page-break/><text:s text:c="4"/>Code:</text:p>
      <text:p text:style-name="P15"><text:tab/><text:span text:style-name="T42">// </text:span><text:span text:style-name="T43">method body start</text:span></text:p>
      <text:p text:style-name="P15"><text:tab/> 0: iconst_<text:span text:style-name="T44">0<text:tab/><text:tab/>// load constant 0 to stack</text:span></text:p>
      <text:p text:style-name="P15"><text:s text:c="7"/>1: istore_2<text:tab/><text:tab/>// <text:span text:style-name="T45">int sum = 0;</text:span></text:p>
      <text:p text:style-name="P15"><text:tab/><text:span text:style-name="T42">// </text:span><text:span text:style-name="T46">main loop start</text:span></text:p>
      <text:p text:style-name="P15"><text:s text:c="7"/>2: iconst_0<text:tab/><text:tab/><text:span text:style-name="T44">// load constant 0 to stack</text:span></text:p>
      <text:p text:style-name="P15"><text:s text:c="7"/>3: istore_3<text:tab/><text:tab/>// initilize idx: <text:span text:style-name="T45">int idx = 0</text:span></text:p>
      <text:p text:style-name="P15"><text:tab/><text:span text:style-name="T42">// </text:span><text:span text:style-name="T46">main loop exit condition start</text:span></text:p>
      <text:p text:style-name="P15"><text:s text:c="7"/>4: iload_3<text:tab/><text:tab/><text:tab/><text:span text:style-name="T44">// load </text:span><text:span text:style-name="T47">int value of local variable idx to s</text:span><text:span text:style-name="T44">tack</text:span></text:p>
      <text:p text:style-name="P15"><text:s text:c="7"/>5: iload_1<text:tab/><text:tab/><text:tab/><text:span text:style-name="T44">// load </text:span><text:span text:style-name="T47">int value of formal variable size to s</text:span><text:span text:style-name="T44">tack</text:span></text:p>
      <text:p text:style-name="P15"><text:s text:c="7"/>6: if_icmpge <text:s text:c="4"/>29<text:tab/>// <text:span text:style-name="T44">check main loop </text:span><text:span text:style-name="T47">continuation</text:span><text:span text:style-name="T44"> condition: </text:span><text:span text:style-name="T48">idx &lt; size</text:span></text:p>
      <text:p text:style-name="P15"><text:tab/><text:tab/><text:tab/><text:tab/><text:tab/>// <text:span text:style-name="T44">and jump to label 29 when if fails</text:span></text:p>
      <text:p text:style-name="P15"><text:s text:c="6"/><text:span text:style-name="T42">// </text:span><text:span text:style-name="T49">main loop exit condition end</text:span></text:p>
      <text:p text:style-name="P15"><text:tab/><text:span text:style-name="T42">// </text:span><text:span text:style-name="T46">main loop body start</text:span></text:p>
      <text:p text:style-name="P15"><text:tab/><text:span text:style-name="T42">// </text:span><text:span text:style-name="T46">if check </text:span><text:span text:style-name="T49">start</text:span><text:span text:style-name="T46">: if ((arr[idx] &amp; 1) == 0)</text:span></text:p>
      <text:p text:style-name="P15"><text:s text:c="7"/>9: aload_0<text:tab/><text:tab/><text:tab/>// <text:span text:style-name="T44">load value (which is reference) of formal variable </text:span></text:p>
      <text:p text:style-name="P17"><text:tab/><text:tab/><text:tab/><text:tab/><text:tab/>// arr to stack</text:p>
      <text:p text:style-name="P15"><text:s text:c="6"/>10: iload_3<text:tab/><text:tab/><text:tab/>// <text:span text:style-name="T44">load int value of local variable idx to stack</text:span></text:p>
      <text:p text:style-name="P15"><text:s text:c="6"/>11: iaload<text:tab/><text:tab/><text:tab/>// <text:span text:style-name="T44">load int value from array (arr[idx]) to stack</text:span></text:p>
      <text:p text:style-name="P15"><text:s text:c="6"/>12: iconst_1<text:tab/><text:tab/>// <text:span text:style-name="T44">load constant 1 to stack</text:span></text:p>
      <text:p text:style-name="P15"><text:s text:c="6"/>13: iand<text:tab/><text:tab/><text:tab/>// <text:span text:style-name="T44">perform bitwise AND operation on int operands:</text:span></text:p>
      <text:p text:style-name="P15"><text:tab/><text:tab/><text:tab/><text:tab/><text:tab/>// <text:span text:style-name="T50">arr[idx] &amp; 1</text:span></text:p>
      <text:p text:style-name="P15"><text:s text:c="6"/>14: ifne <text:s text:c="9"/>23<text:tab/>// <text:span text:style-name="T51">check if value in stack is equalt to 0:</text:span></text:p>
      <text:p text:style-name="P15"><text:span text:style-name="T51"><text:tab/><text:tab/><text:tab/><text:tab/><text:tab/>// </text:span><text:span text:style-name="T52">(arr[idx] &amp; 1) == 0</text:span><text:span text:style-name="T51">. If it is not — jump to label </text:span></text:p>
      <text:p text:style-name="P18"><text:tab/><text:tab/><text:tab/><text:tab/><text:tab/>// 23:</text:p>
      <text:p text:style-name="P18"><text:s text:c="6"/><text:span text:style-name="T42">// </text:span><text:span text:style-name="T49">if check end</text:span></text:p>
      <text:p text:style-name="P15"><text:tab/><text:span text:style-name="T42">// if true branch </text:span><text:span text:style-name="T53">start</text:span></text:p>
      <text:p text:style-name="P15"><text:s text:c="6"/>17: iload_2<text:tab/><text:tab/><text:tab/>// <text:span text:style-name="T51">load int value of local variable sum to stack</text:span></text:p>
      <text:p text:style-name="P15"><text:s text:c="6"/>18: aload_0<text:tab/><text:tab/><text:tab/>// <text:span text:style-name="T44">load value (which is reference) of formal variable </text:span></text:p>
      <text:p text:style-name="P17"><text:tab/><text:tab/><text:tab/><text:tab/><text:tab/>// arr to stack</text:p>
      <text:p text:style-name="P15"><text:s text:c="6"/>19: iload_3<text:tab/><text:tab/><text:tab/>// <text:span text:style-name="T44">load int value of local variable idx to stack</text:span></text:p>
      <text:p text:style-name="P15"><text:s text:c="6"/>20: iaload<text:tab/><text:tab/><text:tab/>// <text:span text:style-name="T44">load int value from array (arr[idx]) to stack</text:span></text:p>
      <text:p text:style-name="P15"><text:s text:c="6"/>21: iadd<text:tab/><text:tab/><text:tab/>// <text:span text:style-name="T54">perform operation ADD over to ints: sum + a[idx]</text:span></text:p>
      <text:p text:style-name="P15"><text:s text:c="6"/>22: istore_2<text:tab/><text:tab/>// <text:span text:style-name="T54">save int result of ADD to sum: </text:span><text:span text:style-name="T55">sum += arr[idx]</text:span></text:p>
      <text:p text:style-name="P15"><text:s text:c="6"/><text:span text:style-name="T42">// if true branch </text:span><text:span text:style-name="T49">end</text:span></text:p>
      <text:p text:style-name="P15"><text:tab/><text:span text:style-name="T42">// </text:span><text:span text:style-name="T46">main loop body end</text:span></text:p>
      <text:p text:style-name="P15"><text:s text:c="6"/>23: iinc <text:s text:c="9"/>3, 1<text:tab/>// increment idx: <text:span text:style-name="T45">idx++</text:span></text:p>
      <text:p text:style-name="P15"><text:s text:c="6"/>26: goto <text:s text:c="9"/>4<text:tab/>// <text:span text:style-name="T44">go to loop exit condition</text:span></text:p>
      <text:p text:style-name="P15"><text:tab/><text:span text:style-name="T42">// </text:span><text:span text:style-name="T46">main loop end</text:span></text:p>
      <text:p text:style-name="P15"><text:s text:c="6"/>29: iload_2<text:tab/><text:tab/><text:tab/>// <text:span text:style-name="T54">load value saved in sum to operand stack</text:span></text:p>
      <text:p text:style-name="P15"><text:s text:c="6"/>30: ireturn<text:tab/><text:tab/><text:tab/>// <text:span text:style-name="T54">return sum from method: </text:span><text:span text:style-name="T55">return sum;</text:span></text:p>
      <text:p text:style-name="P19"><text:span text:style-name="T50"><text:s text:c="6"/></text:span><text:span text:style-name="T53">// </text:span><text:span text:style-name="T49">function body end</text:span></text:p>
      <text:h text:style-name="P20" text:outline-level="1"/>
      <text:p text:style-name="P21"/>
      <text:h text:style-name="P22" text:outline-level="1">3. Порівняльний аналіз асемблерного коду і байт-коду Java</text:h>
      <text:p text:style-name="P23"><text:span text:style-name="T56">(</text:span><text:span text:style-name="T57">Вміст таблиці</text:span><text:span text:style-name="T56"> відрізнятиметься в залежності від варіанту.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4">№</text:p>
          </table:table-cell>
          <table:table-cell table:style-name="Table2.A1" office:value-type="string">
            <text:p text:style-name="P25">Код мовою C</text:p>
          </table:table-cell>
          <table:table-cell table:style-name="Table2.A1" office:value-type="string">
            <text:p text:style-name="P25">Код мовою Java</text:p>
          </table:table-cell>
          <table:table-cell table:style-name="Table2.A1" office:value-type="string">
            <text:p text:style-name="P25">Асемблерний код</text:p>
          </table:table-cell>
          <table:table-cell table:style-name="Table2.A1" office:value-type="string">
            <text:p text:style-name="P25">Байт-код Java</text:p>
          </table:table-cell>
          <table:table-cell table:style-name="Table2.F1" office:value-type="string">
            <text:p text:style-name="P26">Опис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8">int sum = 0;</text:p>
          </table:table-cell>
          <table:table-cell table:style-name="Table2.A2" office:value-type="string">
            <text:p text:style-name="P28">int sum = 0;</text:p>
          </table:table-cell>
          <table:table-cell table:style-name="Table2.A2" office:value-type="string">
            <text:p text:style-name="P28">mov <text:s/>DWORD PTR -8[rbp], 0</text:p>
          </table:table-cell>
          <table:table-cell table:style-name="Table2.A2" office:value-type="string">
            <text:p text:style-name="P29">iconst_<text:span text:style-name="T44">0</text:span></text:p>
            <text:p text:style-name="P29">istore_2</text:p>
          </table:table-cell>
          <table:table-cell table:style-name="Table2.F2" office:value-type="string">
            <text:p text:style-name="P30">визначення змінної sum і запис в неї значення 0. <text:span text:style-name="T58">Через необхідність роботи з неявними параметрами, що беруться зі стеку, байт-код налічує дві інструкції для аналогічного коду, записаного мовою асемблера</text:span>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A2" office:value-type="string">
            <text:p text:style-name="P31">arr[idx]</text:p>
          </table:table-cell>
          <table:table-cell table:style-name="Table2.A2" office:value-type="string">
            <text:p text:style-name="P31">arr[idx]</text:p>
          </table:table-cell>
          <table:table-cell table:style-name="Table2.A2" office:value-type="string">
            <text:p text:style-name="P32"><text:span text:style-name="T59">m</text:span><text:span text:style-name="T60">ov eax, DWORD PTR -4[rbp]</text:span></text:p>
            <text:p text:style-name="P28">cdqe</text:p>
            <text:p text:style-name="P28">lea rdx, 0[0+rax*4]</text:p>
            <text:p text:style-name="P28">mov rax, QWORD PTR -24[rbp]</text:p>
            <text:p text:style-name="P28">add rax, rdx</text:p>
            <text:p text:style-name="P28">mov eax, DWORD PTR [rax]</text:p>
          </table:table-cell>
          <table:table-cell table:style-name="Table2.A2" office:value-type="string">
            <text:p text:style-name="P29">aload_0</text:p>
            <text:p text:style-name="P29">iload_3</text:p>
            <text:p text:style-name="P29">iaload</text:p>
            <text:p text:style-name="P29"/>
          </table:table-cell>
          <table:table-cell table:style-name="Table2.F2" office:value-type="string">
            <text:p text:style-name="P30">отримання значення з визначеної комірки масиву (за індексом). <text:span text:style-name="T58">В асемблерному коді відбувається приведення типів даних, і вирахування адреси, через що кількість команд більша, ніж в байт-коді</text:span>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33">idx &lt; size</text:p>
          </table:table-cell>
          <table:table-cell table:style-name="Table2.A2" office:value-type="string">
            <text:p text:style-name="P33">idx &lt; size</text:p>
          </table:table-cell>
          <table:table-cell table:style-name="Table2.A2" office:value-type="string">
            <text:p text:style-name="P28">mov eax, DWORD PTR -4[rbp]</text:p>
            <text:p text:style-name="P28">cmp eax, DWORD PTR -28[rbp]</text:p>
            <text:p text:style-name="P28">jl .L4</text:p>
          </table:table-cell>
          <table:table-cell table:style-name="Table2.A2" office:value-type="string">
            <text:p text:style-name="P29">iload_3</text:p>
            <text:p text:style-name="P29">iload_1</text:p>
            <text:p text:style-name="P29">if_icmpge 29</text:p>
          </table:table-cell>
          <table:table-cell table:style-name="Table2.F2" office:value-type="string">
            <text:p text:style-name="P34">перевірка умови виходу з циклу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35">arr[idx] &amp; 1</text:p>
          </table:table-cell>
          <table:table-cell table:style-name="Table2.A2" office:value-type="string">
            <text:p text:style-name="P35">arr[idx] &amp; 1</text:p>
          </table:table-cell>
          <table:table-cell table:style-name="Table2.A2" office:value-type="string">
            <text:p text:style-name="P32"><text:span text:style-name="T61">&lt;</text:span><text:span text:style-name="T62">#2&gt;</text:span></text:p>
            <text:p text:style-name="P28">and eax, 1</text:p>
          </table:table-cell>
          <table:table-cell table:style-name="Table2.A2" office:value-type="string">
            <text:p text:style-name="P36">&lt;#2&gt;</text:p>
            <text:p text:style-name="P29">iand</text:p>
          </table:table-cell>
          <table:table-cell table:style-name="Table2.F2" office:value-type="string">
            <text:p text:style-name="P32"><text:span text:style-name="T63">&lt;</text:span><text:span text:style-name="T64">#2</text:span><text:span text:style-name="T63">&gt; - див. рядок 2.</text:span></text:p>
            <text:p text:style-name="P37">виконання операції “І”</text:p>
          </table:table-cell>
        </table:table-row>
        <table:table-row>
          <table:table-cell table:style-name="Table2.A2" office:value-type="string">
            <text:p text:style-name="P38">5</text:p>
          </table:table-cell>
          <table:table-cell table:style-name="Table2.A2" office:value-type="string">
            <text:p text:style-name="P33"><text:span text:style-name="T65">!</text:span><text:span text:style-name="T66">(</text:span><text:span text:style-name="T65">arr[idx] &amp; 1</text:span><text:span text:style-name="T66">)</text:span></text:p>
          </table:table-cell>
          <table:table-cell table:style-name="Table2.A2" office:value-type="string">
            <text:p text:style-name="P39">(<text:span text:style-name="T65">arr[idx] &amp; 1</text:span>) == 0</text:p>
          </table:table-cell>
          <table:table-cell table:style-name="Table2.A2" office:value-type="string">
            <text:p text:style-name="P36">&lt;#2&gt;</text:p>
            <text:p text:style-name="P40">&lt;#4&gt;</text:p>
            <text:p text:style-name="P40">test eax, eax</text:p>
            <text:p text:style-name="P40">jne .L3</text:p>
          </table:table-cell>
          <table:table-cell table:style-name="Table2.A2" office:value-type="string">
            <text:p text:style-name="P36">&lt;#2&gt;</text:p>
            <text:p text:style-name="P40">&lt;#4&gt;</text:p>
            <text:p text:style-name="P29">i<text:span text:style-name="T66">fne 23</text:span></text:p>
          </table:table-cell>
          <table:table-cell table:style-name="Table2.F2" office:value-type="string">
            <text:p text:style-name="P41">перевірка умови в if. <text:span text:style-name="T67">Мовою асемблера операція порівняння виконується двома інструкціями (встановлення прапорців і умовний перехід), в той час як байт-код містить лише одну команду, що виконує порівняння і перехід</text:span></text:p>
          </table:table-cell>
        </table:table-row>
        <table:table-row>
          <table:table-cell table:style-name="Table2.A2" office:value-type="string">
            <text:p text:style-name="P38">6</text:p>
          </table:table-cell>
          <table:table-cell table:style-name="Table2.A2" office:value-type="string">
            <text:p text:style-name="P33">if (<text:span text:style-name="T68">&lt;cond&gt;</text:span>) </text:p>
            <text:p text:style-name="P33"><text:soft-page-break/><text:s text:c="2"/><text:span text:style-name="T68">&lt;statement&gt;</text:span></text:p>
            <text:p text:style-name="P33">...</text:p>
          </table:table-cell>
          <table:table-cell table:style-name="Table2.A2" office:value-type="string">
            <text:p text:style-name="P33">if (<text:span text:style-name="T68">&lt;cond&gt;</text:span>) </text:p>
            <text:p text:style-name="P33"><text:soft-page-break/><text:s text:c="2"/><text:span text:style-name="T68">&lt;statement&gt;</text:span></text:p>
            <text:p text:style-name="P33">...</text:p>
          </table:table-cell>
          <table:table-cell table:style-name="Table2.A2" office:value-type="string">
            <text:p text:style-name="P42"><text:s text:c="2"/>&lt;cond&gt;</text:p>
            <text:p text:style-name="P42"><text:soft-page-break/><text:s text:c="2"/>jne .L3</text:p>
            <text:p text:style-name="P42"><text:s text:c="2"/>&lt;statement&gt;</text:p>
            <text:p text:style-name="P42">.L3</text:p>
            <text:p text:style-name="P42"><text:s text:c="2"/>...</text:p>
          </table:table-cell>
          <table:table-cell table:style-name="Table2.A2" office:value-type="string">
            <text:p text:style-name="P29"><text:s text:c="4"/><text:span text:style-name="T68">&lt;cond&gt;</text:span></text:p>
            <text:p text:style-name="P29"><text:soft-page-break/><text:s text:c="4"/>ifne 23</text:p>
            <text:p text:style-name="P29"><text:s text:c="4"/><text:span text:style-name="T68">&lt;statement&gt;</text:span></text:p>
            <text:p text:style-name="P43">23: ...</text:p>
          </table:table-cell>
          <table:table-cell table:style-name="Table2.F2" office:value-type="string">
            <text:p text:style-name="P44">реалізація умовного переходу if</text:p>
          </table:table-cell>
        </table:table-row>
        <table:table-row>
          <table:table-cell table:style-name="Table2.A2" office:value-type="string">
            <text:p text:style-name="P38">7</text:p>
          </table:table-cell>
          <table:table-cell table:style-name="Table2.A2" office:value-type="string">
            <text:p text:style-name="P45">for (int idx = 0; idx &lt; size; idx++)</text:p>
            <text:p text:style-name="P45"><text:s text:c="2"/>&lt;statement&gt;</text:p>
          </table:table-cell>
          <table:table-cell table:style-name="Table2.A2" office:value-type="string">
            <text:p text:style-name="P45">for (int idx = 0; idx &lt; size; idx++)</text:p>
            <text:p text:style-name="P45"><text:s text:c="2"/>&lt;statement&gt;</text:p>
          </table:table-cell>
          <table:table-cell table:style-name="Table2.A2" office:value-type="string">
            <text:p text:style-name="P28">... <text:span text:style-name="T69">(todo)</text:span></text:p>
          </table:table-cell>
          <table:table-cell table:style-name="Table2.A2" office:value-type="string">
            <text:p text:style-name="P46">... <text:span text:style-name="T69">(todo)</text:span></text:p>
          </table:table-cell>
          <table:table-cell table:style-name="Table2.F2" office:value-type="string">
            <text:p text:style-name="P47">реалізація циклу з лічильником for. <text:span text:style-name="T67">Відмінність полягає в тому, що ... </text:span><text:span text:style-name="T70">(todo)</text:span></text:p>
          </table:table-cell>
        </table:table-row>
        <table:table-row>
          <table:table-cell table:style-name="Table2.A2" office:value-type="string">
            <text:p text:style-name="P27">...</text:p>
          </table:table-cell>
          <table:table-cell table:style-name="Table2.A2" office:value-type="string">
            <text:p text:style-name="P31">...</text:p>
          </table:table-cell>
          <table:table-cell table:style-name="Table2.A2" office:value-type="string">
            <text:p text:style-name="P28">...</text:p>
          </table:table-cell>
          <table:table-cell table:style-name="Table2.A2" office:value-type="string">
            <text:p text:style-name="P28">...</text:p>
          </table:table-cell>
          <table:table-cell table:style-name="Table2.A2" office:value-type="string">
            <text:p text:style-name="P28">...</text:p>
          </table:table-cell>
          <table:table-cell table:style-name="Table2.F2" office:value-type="string">
            <text:p text:style-name="P48">... <text:span text:style-name="T70">(todo)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in" fo:margin-bottom="0in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14T12:50:33.771036030</meta:creation-date>
    <meta:generator>LibreOffice/25.8.4.2$Linux_X86_64 LibreOffice_project/580$Build-2</meta:generator>
    <dc:date>2026-02-05T11:08:29.670530632</dc:date>
    <meta:editing-duration>PT40M17S</meta:editing-duration>
    <meta:editing-cycles>11</meta:editing-cycles>
    <dc:creator>Oleksii Molchanov</dc:creator>
    <meta:document-statistic meta:table-count="1" meta:image-count="0" meta:object-count="0" meta:page-count="5" meta:paragraph-count="167" meta:word-count="959" meta:character-count="5986" meta:non-whitespace-character-count="4837"/>
  </office:meta>
</office:document-meta>
</file>